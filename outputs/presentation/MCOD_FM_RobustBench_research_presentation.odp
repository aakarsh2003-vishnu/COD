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A00000258F7A0399D.png" manifest:media-type="image/png"/>
  <manifest:file-entry manifest:full-path="Pictures/100000010000041A00000258D894D642.png" manifest:media-type="image/png"/>
  <manifest:file-entry manifest:full-path="Pictures/10000000000004EC000000D474307878.png" manifest:media-type="image/png"/>
  <manifest:file-entry manifest:full-path="Pictures/10000000000005140000028A26BEADA0.png" manifest:media-type="image/png"/>
  <manifest:file-entry manifest:full-path="Pictures/10000000000004B0000002087306D756.png" manifest:media-type="image/png"/>
  <manifest:file-entry manifest:full-path="Pictures/10000001000003E8000001907451D78D.png" manifest:media-type="image/png"/>
  <manifest:file-entry manifest:full-path="Pictures/1000000100000384000002EE7E66ACDF.png" manifest:media-type="image/png"/>
  <manifest:file-entry manifest:full-path="Pictures/100000010000041A00000258BF032386.png" manifest:media-type="image/png"/>
  <manifest:file-entry manifest:full-path="Pictures/100000010000041A00000258BFB04B3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7f8fa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0b6e69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d8dee8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d8dee8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8" style:family="graphic">
      <style:graphic-properties style:protect="size" loext:decorative="false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d8dee8" draw:fill="solid" draw:fill-color="#eef3f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7" style:family="graphic" style:parent-style-name="standard">
      <style:graphic-properties draw:stroke="solid" svg:stroke-width="0.026cm" svg:stroke-color="#d8dee8" draw:fill="solid" draw:fill-color="#fff4e8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3" style:family="graphic" style:parent-style-name="standard">
      <style:graphic-properties draw:stroke="solid" svg:stroke-width="0.026cm" svg:stroke-color="#d8dee8" draw:fill="solid" draw:fill-color="#0b6e69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8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8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0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0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0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0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0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8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8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8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8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8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8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3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3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9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9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5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5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8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8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8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9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3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4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f7f8fa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" style:family="paragraph">
      <loext:graphic-properties draw:fill="solid" draw:fill-color="#0b6e69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8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8%" fo:text-align="start" fo:text-indent="0cm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8%" fo:text-align="end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8%" fo:text-align="end" fo:text-indent="0cm" style:font-independent-line-spacing="true"/>
      <style:text-properties fo:font-size="18pt"/>
    </style:style>
    <style:style style:name="P8" style:family="paragraph">
      <loext:graphic-properties draw:fill="solid" draw:fill-color="#d8dee8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eef3f2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loext:graphic-properties draw:fill="solid" draw:fill-color="#fff4e8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3" style:family="text">
      <style:text-properties fo:font-variant="normal" fo:text-transform="none" fo:color="#5d6d7e" loext:opacity="100%" style:text-outline="false" style:text-line-through-style="none" style:text-line-through-type="none" style:text-position="0% 100%" style:font-name="Aptos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25pt" fo:letter-spacing="normal" fo:language="en" fo:country="US" fo:font-style="normal" style:text-underline-style="none" fo:font-weight="bold" fo:background-color="transparent" style:font-size-asian="25pt" style:font-style-asian="normal" style:font-weight-asian="bold" style:font-size-complex="25pt" style:font-style-complex="normal" style:font-weight-complex="bold"/>
    </style:style>
    <style:style style:name="T5" style:family="text">
      <style:text-properties fo:font-variant="normal" fo:text-transform="none" fo:color="#0b6e69" loext:opacity="100%" style:text-outline="false" style:text-line-through-style="none" style:text-line-through-type="none" style:text-position="0% 100%" style:font-name="Aptos" fo:font-size="23pt" fo:letter-spacing="normal" fo:language="en" fo:country="US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6" style:family="text">
      <style:text-properties fo:font-variant="normal" fo:text-transform="none" fo:color="#5d6d7e" loext:opacity="100%" style:text-outline="false" style:text-line-through-style="none" style:text-line-through-type="none" style:text-position="0% 100%" style:font-name="Apto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fo:color="#0b6e69" loext:opacity="100%" style:text-outline="false" style:text-line-through-style="none" style:text-line-through-type="none" style:text-position="0% 100%" style:font-name="Aptos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2e5aac" loext:opacity="100%" style:text-outline="false" style:text-line-through-style="none" style:text-line-through-type="none" style:text-position="0% 100%" style:font-name="Aptos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font-variant="normal" fo:text-transform="none" fo:color="#b75d00" loext:opacity="100%" style:text-outline="false" style:text-line-through-style="none" style:text-line-through-type="none" style:text-position="0% 100%" style:font-name="Aptos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13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7pt" fo:letter-spacing="normal" fo:language="en" fo:country="US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style:style style:name="T18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T19" style:family="text">
      <style:text-properties fo:font-variant="normal" fo:text-transform="none" fo:color="#0b6e69" loext:opacity="100%" style:text-outline="false" style:text-line-through-style="none" style:text-line-through-type="none" style:text-position="0% 100%" style:font-name="Apto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2e5aac" loext:opacity="100%" style:text-outline="false" style:text-line-through-style="none" style:text-line-through-type="none" style:text-position="0% 100%" style:font-name="Apto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23" style:family="text">
      <style:text-properties fo:font-variant="normal" fo:text-transform="none" fo:color="#b75d00" loext:opacity="100%" style:text-outline="false" style:text-line-through-style="none" style:text-line-through-type="none" style:text-position="0% 100%" style:font-name="Apto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variant="normal" fo:text-transform="none" fo:color="#5d6d7e" loext:opacity="100%" style:text-outline="false" style:text-line-through-style="none" style:text-line-through-type="none" style:text-position="0% 100%" style:font-name="Aptos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variant="normal" fo:text-transform="none" fo:color="#17202a" loext:opacity="100%" style:text-outline="false" style:text-line-through-style="none" style:text-line-through-type="none" style:text-position="0% 100%" style:font-name="Apto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17202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5d6d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b6e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OpenSymbol" fo:color="#17202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2e5a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b75d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Box 2" draw:style-name="gr1" draw:text-style-name="P2" draw:layer="layout" svg:width="25.399cm" svg:height="14.287cm" svg:x="0.635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" draw:text-style-name="P5" draw:layer="layout" svg:width="19.303cm" svg:height="1.066cm" svg:x="0.711cm" svg:y="0.457cm">
          <text:p text:style-name="P4"><text:span text:style-name="T2">MCOD-FM-RobustBe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" draw:text-style-name="P7" draw:layer="layout" svg:width="3.428cm" svg:height="0.71cm" svg:x="20.955cm" svg:y="0.559cm">
          <text:p text:style-name="P6"><text:span text:style-name="T3">01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" draw:text-style-name="P5" draw:layer="layout" svg:width="21.589cm" svg:height="0.634cm" svg:x="0.762cm" svg:y="1.473cm">
          <text:p text:style-name="P4"><text:span text:style-name="T3">Research-level presentation: paper review, dataset audit, preprocessing, baseline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5" draw:layer="layout" svg:width="13.969cm" svg:height="2.539cm" svg:x="0.965cm" svg:y="2.413cm">
          <text:p text:style-name="P4"><text:span text:style-name="T4">Foundation-Model Promptability and Spectral-Degradation Robustness Benchmark</text:span></text:p>
          <text:p text:style-name="P4"><text:span text:style-name="T4">for Multispectral Camouflaged Object De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2" draw:style-name="gr8" draw:text-style-name="P9" draw:layer="layout" svg:width="4.52cm" svg:height="1.98cm" svg:x="1.27cm" svg:y="11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3" draw:style-name="gr9" draw:text-style-name="P5" draw:layer="layout" svg:width="1.828cm" svg:height="0.812cm" svg:x="2.617cm" svg:y="11.253cm">
          <text:p text:style-name="P4"><text:span text:style-name="T5">1,5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" draw:text-style-name="P5" draw:layer="layout" svg:width="3.682cm" svg:height="0.558cm" svg:x="1.27cm" svg:y="11.302cm">
          <text:p text:style-name="P4"><text:span text:style-name="T6">MSI 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5" draw:style-name="gr8" draw:text-style-name="P9" draw:layer="layout" svg:width="4.52cm" svg:height="1.98cm" svg:x="7.62cm" svg:y="11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6" draw:style-name="gr11" draw:text-style-name="P5" draw:layer="layout" svg:width="1.828cm" svg:height="0.812cm" svg:x="8.89cm" svg:y="11.43cm">
          <text:p text:style-name="P4"><text:span text:style-name="T5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" draw:text-style-name="P5" draw:layer="layout" svg:width="3.682cm" svg:height="0.558cm" svg:x="8.255cm" svg:y="12.142cm">
          <text:p text:style-name="P4"><text:span text:style-name="T6">spectral b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8" draw:style-name="gr8" draw:text-style-name="P9" draw:layer="layout" svg:width="4.52cm" svg:height="1.98cm" svg:x="13.97cm" svg:y="11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9" draw:style-name="gr13" draw:text-style-name="P5" draw:layer="layout" svg:width="1.828cm" svg:height="0.812cm" svg:x="15.317cm" svg:y="11.888cm">
          <text:p text:style-name="P4"><text:span text:style-name="T5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4" draw:text-style-name="P5" draw:layer="layout" svg:width="3.682cm" svg:height="0.558cm" svg:x="14.098cm" svg:y="11.302cm">
          <text:p text:style-name="P4"><text:span text:style-name="T6">test spl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1" draw:style-name="gr8" draw:text-style-name="P9" draw:layer="layout" svg:width="4.52cm" svg:height="1.98cm" svg:x="19.61cm" svg:y="11.35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2" draw:style-name="gr15" draw:text-style-name="P5" draw:layer="layout" svg:width="1.828cm" svg:height="0.812cm" svg:x="20.32cm" svg:y="11.888cm">
          <text:p text:style-name="P4"><text:span text:style-name="T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6" draw:text-style-name="P5" draw:layer="layout" svg:width="3.682cm" svg:height="0.558cm" svg:x="19.813cm" svg:y="11.507cm">
          <text:p text:style-name="P4"><text:span text:style-name="T6">COD basel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7" draw:text-style-name="P5" draw:layer="layout" svg:width="21.589cm" svg:height="2.031cm" svg:x="1.168cm" svg:y="9.271cm">
          <text:p text:style-name="P4"><text:span text:style-name="T7">Core claim: RGB camouflage failures are partly spectral failures; MCOD lets us test whether non-visible bands make the object separable and robu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9" draw:text-style-name="P5" draw:layer="layout" svg:width="19.303cm" svg:height="1.066cm" svg:x="0.711cm" svg:y="0.457cm">
          <text:p text:style-name="P4"><text:span text:style-name="T2">Paper Review: Problem And G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0" draw:text-style-name="P7" draw:layer="layout" svg:width="3.428cm" svg:height="0.71cm" svg:x="20.955cm" svg:y="0.559cm">
          <text:p text:style-name="P6"><text:span text:style-name="T3">02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1" draw:text-style-name="P5" draw:layer="layout" svg:width="21.589cm" svg:height="0.634cm" svg:x="0.762cm" svg:y="1.473cm">
          <text:p text:style-name="P4"><text:span text:style-name="T3">MCOD: The First Challenging Benchmark for Multispectral Camouflaged Object Detection, ACM MM 20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" draw:style-name="gr22" draw:text-style-name="P11" draw:layer="layout" svg:width="6.857cm" svg:height="9.778cm" svg:x="0.965cm" svg:y="2.337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2" draw:style-name="gr23" draw:text-style-name="P5" draw:layer="layout" svg:width="6.146cm" svg:height="0.888cm" svg:x="1.27cm" svg:y="2.642cm">
          <text:p text:style-name="P4"><text:span text:style-name="T8">Why RGB COD satur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4" draw:text-style-name="P5" draw:layer="layout" svg:width="5.968cm" svg:height="6.476cm" svg:x="1.321cm" svg:y="3.81cm">
          <text:list text:style-name="L5">
            <text:list-item>
              <text:p text:style-name="P4"><text:span text:style-name="T9">Objects share color and texture with their background.</text:span></text:p>
            </text:list-item>
            <text:list-item>
              <text:p text:style-name="P4"><text:span text:style-name="T9">Small targets and extreme illumination trigger missed detections.</text:span></text:p>
            </text:list-item>
            <text:list-item>
              <text:p text:style-name="P4"><text:span text:style-name="T9">Most prior COD datasets are RGB-only.</text:span></text:p>
            </text:list-item>
            <text:list-item>
              <text:p text:style-name="P4"><text:span text:style-name="T9">Existing COD networks are often architecture-heavy but modality-limit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4" draw:style-name="gr8" draw:text-style-name="P9" draw:layer="layout" svg:width="6.857cm" svg:height="9.778cm" svg:x="8.509cm" svg:y="2.337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5" draw:style-name="gr25" draw:text-style-name="P5" draw:layer="layout" svg:width="6.146cm" svg:height="0.888cm" svg:x="8.839cm" svg:y="2.642cm">
          <text:p text:style-name="P4"><text:span text:style-name="T10">MCOD interv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6" draw:text-style-name="P5" draw:layer="layout" svg:width="5.968cm" svg:height="6.476cm" svg:x="8.89cm" svg:y="3.81cm">
          <text:list text:style-name="L5">
            <text:list-item>
              <text:p text:style-name="P4"><text:span text:style-name="T9">First public MSI benchmark for COD.</text:span></text:p>
            </text:list-item>
            <text:list-item>
              <text:p text:style-name="P4"><text:span text:style-name="T9">8 registered spectral channels per sample.</text:span></text:p>
            </text:list-item>
            <text:list-item>
              <text:p text:style-name="P4"><text:span text:style-name="T9">High-resolution 1140 x 860 imagery.</text:span></text:p>
            </text:list-item>
            <text:list-item>
              <text:p text:style-name="P4"><text:span text:style-name="T9">Pixel-level masks plus challenge attribut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7" draw:style-name="gr27" draw:text-style-name="P12" draw:layer="layout" svg:width="6.984cm" svg:height="9.778cm" svg:x="16.078cm" svg:y="2.337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8" draw:style-name="gr28" draw:text-style-name="P5" draw:layer="layout" svg:width="6.146cm" svg:height="0.888cm" svg:x="16.408cm" svg:y="2.642cm">
          <text:p text:style-name="P4"><text:span text:style-name="T11">Research im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9" draw:text-style-name="P5" draw:layer="layout" svg:width="5.968cm" svg:height="6.476cm" svg:x="16.459cm" svg:y="3.81cm">
          <text:list text:style-name="L5">
            <text:list-item>
              <text:p text:style-name="P4"><text:span text:style-name="T9">Foreground-background discrimination can come from material/spectral response, not just RGB appearance.</text:span></text:p>
            </text:list-item>
            <text:list-item>
              <text:p text:style-name="P4"><text:span text:style-name="T9">The benchmark opens a route for spectral fusion, spectral promptability, and degradation robustnes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0" draw:text-style-name="P5" draw:layer="layout" svg:width="19.303cm" svg:height="1.066cm" svg:x="0.711cm" svg:y="0.457cm">
          <text:p text:style-name="P4"><text:span text:style-name="T2">Paper Review: Dataset Positio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1" draw:text-style-name="P7" draw:layer="layout" svg:width="3.428cm" svg:height="0.71cm" svg:x="20.955cm" svg:y="0.559cm">
          <text:p text:style-name="P6"><text:span text:style-name="T3">03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2" draw:text-style-name="P5" draw:layer="layout" svg:width="21.589cm" svg:height="0.634cm" svg:x="0.762cm" svg:y="1.473cm">
          <text:p text:style-name="P4"><text:span text:style-name="T3">Compared with CHAMELEON, CAMO-COCO, NC4K, COD1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" draw:style-name="gr33" draw:text-style-name="P3" draw:layer="layout" svg:width="4.201cm" svg:height="0.93cm" svg:x="0.914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4" draw:text-style-name="P5" draw:layer="layout" svg:width="4.117cm" svg:height="0.903cm" svg:x="0.956cm" svg:y="2.427cm">
          <text:p text:style-name="P4"><text:span text:style-name="T12">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" draw:style-name="gr33" draw:text-style-name="P3" draw:layer="layout" svg:width="1.848cm" svg:height="0.93cm" svg:x="5.116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5" draw:text-style-name="P5" draw:layer="layout" svg:width="1.764cm" svg:height="0.903cm" svg:x="5.158cm" svg:y="2.427cm">
          <text:p text:style-name="P4"><text:span text:style-name="T12">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5" draw:style-name="gr33" draw:text-style-name="P3" draw:layer="layout" svg:width="2.856cm" svg:height="0.93cm" svg:x="6.965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6" draw:text-style-name="P5" draw:layer="layout" svg:width="2.773cm" svg:height="0.903cm" svg:x="7.006cm" svg:y="2.427cm">
          <text:p text:style-name="P4"><text:span text:style-name="T12">Mod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7" draw:style-name="gr33" draw:text-style-name="P3" draw:layer="layout" svg:width="2.352cm" svg:height="0.93cm" svg:x="9.822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7" draw:text-style-name="P5" draw:layer="layout" svg:width="2.269cm" svg:height="0.903cm" svg:x="9.863cm" svg:y="2.427cm">
          <text:p text:style-name="P4"><text:span text:style-name="T12">Chann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9" draw:style-name="gr33" draw:text-style-name="P3" draw:layer="layout" svg:width="6.385cm" svg:height="0.93cm" svg:x="12.174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8" draw:text-style-name="P5" draw:layer="layout" svg:width="6.302cm" svg:height="0.903cm" svg:x="12.216cm" svg:y="2.427cm">
          <text:p text:style-name="P4"><text:span text:style-name="T12">Re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1" draw:style-name="gr33" draw:text-style-name="P3" draw:layer="layout" svg:width="1.848cm" svg:height="0.93cm" svg:x="18.561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9" draw:text-style-name="P5" draw:layer="layout" svg:width="1.764cm" svg:height="0.903cm" svg:x="18.602cm" svg:y="2.427cm">
          <text:p text:style-name="P4"><text:span text:style-name="T12">Att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3" draw:style-name="gr33" draw:text-style-name="P3" draw:layer="layout" svg:width="2.856cm" svg:height="0.93cm" svg:x="20.409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0" draw:text-style-name="P5" draw:layer="layout" svg:width="2.773cm" svg:height="0.903cm" svg:x="20.451cm" svg:y="2.427cm">
          <text:p text:style-name="P4"><text:span text:style-name="T12">Camo im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5" draw:style-name="gr8" draw:text-style-name="P9" draw:layer="layout" svg:width="4.201cm" svg:height="0.93cm" svg:x="0.914cm" svg:y="3.34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1" draw:text-style-name="P5" draw:layer="layout" svg:width="4.117cm" svg:height="0.903cm" svg:x="0.956cm" svg:y="3.358cm">
          <text:p text:style-name="P4"><text:span text:style-name="T13">CHAMELE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7" draw:style-name="gr8" draw:text-style-name="P9" draw:layer="layout" svg:width="1.848cm" svg:height="0.93cm" svg:x="5.116cm" svg:y="3.34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42" draw:text-style-name="P5" draw:layer="layout" svg:width="1.764cm" svg:height="0.903cm" svg:x="5.158cm" svg:y="3.358cm">
          <text:p text:style-name="P4"><text:span text:style-name="T13">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9" draw:style-name="gr8" draw:text-style-name="P9" draw:layer="layout" svg:width="2.856cm" svg:height="0.93cm" svg:x="6.965cm" svg:y="3.34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43" draw:text-style-name="P5" draw:layer="layout" svg:width="2.773cm" svg:height="0.903cm" svg:x="7.006cm" svg:y="3.358cm">
          <text:p text:style-name="P4"><text:span text:style-name="T13">RG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1" draw:style-name="gr8" draw:text-style-name="P9" draw:layer="layout" svg:width="2.352cm" svg:height="0.93cm" svg:x="9.822cm" svg:y="3.34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44" draw:text-style-name="P5" draw:layer="layout" svg:width="2.269cm" svg:height="0.903cm" svg:x="9.863cm" svg:y="3.358cm">
          <text:p text:style-name="P4"><text:span text:style-name="T1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3" draw:style-name="gr8" draw:text-style-name="P9" draw:layer="layout" svg:width="6.385cm" svg:height="0.93cm" svg:x="12.174cm" svg:y="3.34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45" draw:text-style-name="P5" draw:layer="layout" svg:width="6.302cm" svg:height="0.903cm" svg:x="12.216cm" svg:y="3.358cm">
          <text:p text:style-name="P4"><text:span text:style-name="T13">450x300 to 2304x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5" draw:style-name="gr8" draw:text-style-name="P9" draw:layer="layout" svg:width="1.848cm" svg:height="0.93cm" svg:x="18.561cm" svg:y="3.34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46" draw:text-style-name="P5" draw:layer="layout" svg:width="1.764cm" svg:height="0.903cm" svg:x="18.602cm" svg:y="3.358cm">
          <text:p text:style-name="P4"><text:span text:style-name="T13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7" draw:style-name="gr8" draw:text-style-name="P9" draw:layer="layout" svg:width="2.856cm" svg:height="0.93cm" svg:x="20.409cm" svg:y="3.34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47" draw:text-style-name="P5" draw:layer="layout" svg:width="2.773cm" svg:height="0.903cm" svg:x="20.451cm" svg:y="3.358cm">
          <text:p text:style-name="P4"><text:span text:style-name="T13">7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9" draw:style-name="gr8" draw:text-style-name="P9" draw:layer="layout" svg:width="4.201cm" svg:height="0.93cm" svg:x="0.914cm" svg:y="4.2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48" draw:text-style-name="P5" draw:layer="layout" svg:width="4.117cm" svg:height="0.903cm" svg:x="0.956cm" svg:y="4.29cm">
          <text:p text:style-name="P4"><text:span text:style-name="T13">CAMO-CO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1" draw:style-name="gr8" draw:text-style-name="P9" draw:layer="layout" svg:width="1.848cm" svg:height="0.93cm" svg:x="5.116cm" svg:y="4.2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49" draw:text-style-name="P5" draw:layer="layout" svg:width="1.764cm" svg:height="0.903cm" svg:x="5.158cm" svg:y="4.29cm">
          <text:p text:style-name="P4"><text:span text:style-name="T13">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3" draw:style-name="gr8" draw:text-style-name="P9" draw:layer="layout" svg:width="2.856cm" svg:height="0.93cm" svg:x="6.965cm" svg:y="4.2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50" draw:text-style-name="P5" draw:layer="layout" svg:width="2.773cm" svg:height="0.903cm" svg:x="7.006cm" svg:y="4.29cm">
          <text:p text:style-name="P4"><text:span text:style-name="T13">RG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5" draw:style-name="gr8" draw:text-style-name="P9" draw:layer="layout" svg:width="2.352cm" svg:height="0.93cm" svg:x="9.822cm" svg:y="4.2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51" draw:text-style-name="P5" draw:layer="layout" svg:width="2.269cm" svg:height="0.903cm" svg:x="9.863cm" svg:y="4.29cm">
          <text:p text:style-name="P4"><text:span text:style-name="T1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7" draw:style-name="gr8" draw:text-style-name="P9" draw:layer="layout" svg:width="6.385cm" svg:height="0.93cm" svg:x="12.174cm" svg:y="4.2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52" draw:text-style-name="P5" draw:layer="layout" svg:width="6.302cm" svg:height="0.903cm" svg:x="12.216cm" svg:y="4.29cm">
          <text:p text:style-name="P4"><text:span text:style-name="T13">154x156 to 7360x49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9" draw:style-name="gr8" draw:text-style-name="P9" draw:layer="layout" svg:width="1.848cm" svg:height="0.93cm" svg:x="18.561cm" svg:y="4.2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53" draw:text-style-name="P5" draw:layer="layout" svg:width="1.764cm" svg:height="0.903cm" svg:x="18.602cm" svg:y="4.29cm">
          <text:p text:style-name="P4"><text:span text:style-name="T13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1" draw:style-name="gr8" draw:text-style-name="P9" draw:layer="layout" svg:width="2.856cm" svg:height="0.93cm" svg:x="20.409cm" svg:y="4.2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54" draw:text-style-name="P5" draw:layer="layout" svg:width="2.773cm" svg:height="0.903cm" svg:x="20.451cm" svg:y="4.29cm">
          <text:p text:style-name="P4"><text:span text:style-name="T13">1,2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3" draw:style-name="gr8" draw:text-style-name="P9" draw:layer="layout" svg:width="4.201cm" svg:height="0.93cm" svg:x="0.914cm" svg:y="5.2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55" draw:text-style-name="P5" draw:layer="layout" svg:width="4.117cm" svg:height="0.903cm" svg:x="0.956cm" svg:y="5.221cm">
          <text:p text:style-name="P4"><text:span text:style-name="T13">NC4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5" draw:style-name="gr8" draw:text-style-name="P9" draw:layer="layout" svg:width="1.848cm" svg:height="0.93cm" svg:x="5.116cm" svg:y="5.2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56" draw:text-style-name="P5" draw:layer="layout" svg:width="1.764cm" svg:height="0.903cm" svg:x="5.158cm" svg:y="5.221cm">
          <text:p text:style-name="P4"><text:span text:style-name="T13">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7" draw:style-name="gr8" draw:text-style-name="P9" draw:layer="layout" svg:width="2.856cm" svg:height="0.93cm" svg:x="6.965cm" svg:y="5.2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57" draw:text-style-name="P5" draw:layer="layout" svg:width="2.773cm" svg:height="0.903cm" svg:x="7.006cm" svg:y="5.221cm">
          <text:p text:style-name="P4"><text:span text:style-name="T13">RG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9" draw:style-name="gr8" draw:text-style-name="P9" draw:layer="layout" svg:width="2.352cm" svg:height="0.93cm" svg:x="9.822cm" svg:y="5.2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58" draw:text-style-name="P5" draw:layer="layout" svg:width="2.269cm" svg:height="0.903cm" svg:x="9.863cm" svg:y="5.221cm">
          <text:p text:style-name="P4"><text:span text:style-name="T1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1" draw:style-name="gr8" draw:text-style-name="P9" draw:layer="layout" svg:width="6.385cm" svg:height="0.93cm" svg:x="12.174cm" svg:y="5.2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59" draw:text-style-name="P5" draw:layer="layout" svg:width="6.302cm" svg:height="0.903cm" svg:x="12.216cm" svg:y="5.221cm">
          <text:p text:style-name="P4"><text:span text:style-name="T13">354x268 to 1280x9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3" draw:style-name="gr8" draw:text-style-name="P9" draw:layer="layout" svg:width="1.848cm" svg:height="0.93cm" svg:x="18.561cm" svg:y="5.2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60" draw:text-style-name="P5" draw:layer="layout" svg:width="1.764cm" svg:height="0.903cm" svg:x="18.602cm" svg:y="5.221cm">
          <text:p text:style-name="P4"><text:span text:style-name="T13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5" draw:style-name="gr8" draw:text-style-name="P9" draw:layer="layout" svg:width="2.856cm" svg:height="0.93cm" svg:x="20.409cm" svg:y="5.2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61" draw:text-style-name="P5" draw:layer="layout" svg:width="2.773cm" svg:height="0.903cm" svg:x="20.451cm" svg:y="5.221cm">
          <text:p text:style-name="P4"><text:span text:style-name="T13">4,1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7" draw:style-name="gr8" draw:text-style-name="P9" draw:layer="layout" svg:width="4.201cm" svg:height="0.93cm" svg:x="0.914cm" svg:y="6.1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" draw:style-name="gr62" draw:text-style-name="P5" draw:layer="layout" svg:width="4.117cm" svg:height="0.903cm" svg:x="0.956cm" svg:y="6.152cm">
          <text:p text:style-name="P4"><text:span text:style-name="T13">COD1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9" draw:style-name="gr8" draw:text-style-name="P9" draw:layer="layout" svg:width="1.848cm" svg:height="0.93cm" svg:x="5.116cm" svg:y="6.1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0" draw:style-name="gr63" draw:text-style-name="P5" draw:layer="layout" svg:width="1.764cm" svg:height="0.903cm" svg:x="5.158cm" svg:y="6.152cm">
          <text:p text:style-name="P4"><text:span text:style-name="T13">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1" draw:style-name="gr8" draw:text-style-name="P9" draw:layer="layout" svg:width="2.856cm" svg:height="0.93cm" svg:x="6.965cm" svg:y="6.1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2" draw:style-name="gr64" draw:text-style-name="P5" draw:layer="layout" svg:width="2.773cm" svg:height="0.903cm" svg:x="7.006cm" svg:y="6.152cm">
          <text:p text:style-name="P4"><text:span text:style-name="T13">RG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3" draw:style-name="gr8" draw:text-style-name="P9" draw:layer="layout" svg:width="2.352cm" svg:height="0.93cm" svg:x="9.822cm" svg:y="6.1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4" draw:style-name="gr65" draw:text-style-name="P5" draw:layer="layout" svg:width="2.269cm" svg:height="0.903cm" svg:x="9.863cm" svg:y="6.152cm">
          <text:p text:style-name="P4"><text:span text:style-name="T1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5" draw:style-name="gr8" draw:text-style-name="P9" draw:layer="layout" svg:width="6.385cm" svg:height="0.93cm" svg:x="12.174cm" svg:y="6.1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6" draw:style-name="gr66" draw:text-style-name="P5" draw:layer="layout" svg:width="6.302cm" svg:height="0.903cm" svg:x="12.216cm" svg:y="6.152cm">
          <text:p text:style-name="P4"><text:span text:style-name="T13">300x199 to 2976x396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7" draw:style-name="gr8" draw:text-style-name="P9" draw:layer="layout" svg:width="1.848cm" svg:height="0.93cm" svg:x="18.561cm" svg:y="6.1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8" draw:style-name="gr67" draw:text-style-name="P5" draw:layer="layout" svg:width="1.764cm" svg:height="0.903cm" svg:x="18.602cm" svg:y="6.152cm">
          <text:p text:style-name="P4"><text:span text:style-name="T13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9" draw:style-name="gr8" draw:text-style-name="P9" draw:layer="layout" svg:width="2.856cm" svg:height="0.93cm" svg:x="20.409cm" svg:y="6.1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0" draw:style-name="gr68" draw:text-style-name="P5" draw:layer="layout" svg:width="2.773cm" svg:height="0.903cm" svg:x="20.451cm" svg:y="6.152cm">
          <text:p text:style-name="P4"><text:span text:style-name="T13">5,06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1" draw:style-name="gr8" draw:text-style-name="P9" draw:layer="layout" svg:width="4.201cm" svg:height="0.93cm" svg:x="0.914cm" svg:y="7.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2" draw:style-name="gr69" draw:text-style-name="P5" draw:layer="layout" svg:width="4.117cm" svg:height="0.903cm" svg:x="0.956cm" svg:y="7.084cm">
          <text:p text:style-name="P4"><text:span text:style-name="T13">MC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3" draw:style-name="gr8" draw:text-style-name="P9" draw:layer="layout" svg:width="1.848cm" svg:height="0.93cm" svg:x="5.116cm" svg:y="7.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4" draw:style-name="gr70" draw:text-style-name="P5" draw:layer="layout" svg:width="1.764cm" svg:height="0.903cm" svg:x="5.158cm" svg:y="7.084cm">
          <text:p text:style-name="P4"><text:span text:style-name="T13">20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5" draw:style-name="gr8" draw:text-style-name="P9" draw:layer="layout" svg:width="2.856cm" svg:height="0.93cm" svg:x="6.965cm" svg:y="7.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6" draw:style-name="gr71" draw:text-style-name="P5" draw:layer="layout" svg:width="2.773cm" svg:height="0.903cm" svg:x="7.006cm" svg:y="7.084cm">
          <text:p text:style-name="P4"><text:span text:style-name="T13">M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7" draw:style-name="gr8" draw:text-style-name="P9" draw:layer="layout" svg:width="2.352cm" svg:height="0.93cm" svg:x="9.822cm" svg:y="7.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8" draw:style-name="gr72" draw:text-style-name="P5" draw:layer="layout" svg:width="2.269cm" svg:height="0.903cm" svg:x="9.863cm" svg:y="7.084cm">
          <text:p text:style-name="P4"><text:span text:style-name="T13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9" draw:style-name="gr8" draw:text-style-name="P9" draw:layer="layout" svg:width="6.385cm" svg:height="0.93cm" svg:x="12.174cm" svg:y="7.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" draw:style-name="gr73" draw:text-style-name="P5" draw:layer="layout" svg:width="6.302cm" svg:height="0.903cm" svg:x="12.216cm" svg:y="7.084cm">
          <text:p text:style-name="P4"><text:span text:style-name="T13">1140x8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91" draw:style-name="gr8" draw:text-style-name="P9" draw:layer="layout" svg:width="1.848cm" svg:height="0.93cm" svg:x="18.561cm" svg:y="7.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2" draw:style-name="gr74" draw:text-style-name="P5" draw:layer="layout" svg:width="1.764cm" svg:height="0.903cm" svg:x="18.602cm" svg:y="7.084cm">
          <text:p text:style-name="P4"><text:span text:style-name="T13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93" draw:style-name="gr8" draw:text-style-name="P9" draw:layer="layout" svg:width="2.856cm" svg:height="0.93cm" svg:x="20.409cm" svg:y="7.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4" draw:style-name="gr75" draw:text-style-name="P5" draw:layer="layout" svg:width="2.773cm" svg:height="0.903cm" svg:x="20.451cm" svg:y="7.084cm">
          <text:p text:style-name="P4"><text:span text:style-name="T13">1,5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96" draw:style-name="gr8" draw:text-style-name="P9" draw:layer="layout" svg:width="22.224cm" svg:height="2.742cm" svg:x="0.965cm" svg:y="8.71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97" draw:style-name="gr76" draw:text-style-name="P5" draw:layer="layout" svg:width="20.827cm" svg:height="1.65cm" svg:x="1.397cm" svg:y="8.966cm">
          <text:p text:style-name="P4"><text:span text:style-name="T14">MCOD trades raw dataset size for richer sensing: calibrated multispectral capture, uniform spatial resolution, pixel masks, and explicit challenge attributes.</text:span></text:p>
          <text:p text:style-name="P4"><text:span text:style-name="T14">Paper statistic to remember: average object area is 0.429% of the image, far below COD10K's reported 8.94%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7" draw:text-style-name="P5" draw:layer="layout" svg:width="19.303cm" svg:height="1.066cm" svg:x="0.711cm" svg:y="0.457cm">
          <text:p text:style-name="P4"><text:span text:style-name="T2">Paper Review: Challenge Attrib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8" draw:text-style-name="P7" draw:layer="layout" svg:width="3.428cm" svg:height="0.71cm" svg:x="20.955cm" svg:y="0.559cm">
          <text:p text:style-name="P6"><text:span text:style-name="T3">04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9" draw:text-style-name="P5" draw:layer="layout" svg:width="21.589cm" svg:height="0.634cm" svg:x="0.762cm" svg:y="1.473cm">
          <text:p text:style-name="P4"><text:span text:style-name="T3">Eight difficulty labels define targeted evaluation sub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" draw:style-name="gr33" draw:text-style-name="P3" draw:layer="layout" svg:width="1.669cm" svg:height="1.323cm" svg:x="1.067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0" draw:text-style-name="P5" draw:layer="layout" svg:width="1.586cm" svg:height="1.296cm" svg:x="1.108cm" svg:y="2.351cm">
          <text:p text:style-name="P4"><text:span text:style-name="T15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" draw:style-name="gr33" draw:text-style-name="P3" draw:layer="layout" svg:width="3.982cm" svg:height="1.323cm" svg:x="2.737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1" draw:text-style-name="P5" draw:layer="layout" svg:width="3.898cm" svg:height="1.296cm" svg:x="2.779cm" svg:y="2.351cm">
          <text:p text:style-name="P4"><text:span text:style-name="T15">Mea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5" draw:style-name="gr33" draw:text-style-name="P3" draw:layer="layout" svg:width="5.395cm" svg:height="1.323cm" svg:x="6.72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82" draw:text-style-name="P5" draw:layer="layout" svg:width="5.312cm" svg:height="1.296cm" svg:x="6.761cm" svg:y="2.351cm">
          <text:p text:style-name="P4"><text:span text:style-name="T15">Failure pres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7" draw:style-name="gr8" draw:text-style-name="P9" draw:layer="layout" svg:width="1.669cm" svg:height="1.323cm" svg:x="1.067cm" svg:y="3.66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83" draw:text-style-name="P5" draw:layer="layout" svg:width="1.586cm" svg:height="1.296cm" svg:x="1.108cm" svg:y="3.675cm">
          <text:p text:style-name="P4"><text:span text:style-name="T16">S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9" draw:style-name="gr8" draw:text-style-name="P9" draw:layer="layout" svg:width="3.982cm" svg:height="1.323cm" svg:x="2.737cm" svg:y="3.66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84" draw:text-style-name="P5" draw:layer="layout" svg:width="3.898cm" svg:height="1.296cm" svg:x="2.779cm" svg:y="3.675cm">
          <text:p text:style-name="P4"><text:span text:style-name="T16">Shape Compl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1" draw:style-name="gr8" draw:text-style-name="P9" draw:layer="layout" svg:width="5.395cm" svg:height="1.323cm" svg:x="6.72cm" svg:y="3.66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85" draw:text-style-name="P5" draw:layer="layout" svg:width="5.312cm" svg:height="1.296cm" svg:x="6.761cm" svg:y="3.675cm">
          <text:p text:style-name="P4"><text:span text:style-name="T16">irregular bound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3" draw:style-name="gr8" draw:text-style-name="P9" draw:layer="layout" svg:width="1.669cm" svg:height="1.323cm" svg:x="1.067cm" svg:y="4.9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86" draw:text-style-name="P5" draw:layer="layout" svg:width="1.586cm" svg:height="1.296cm" svg:x="1.108cm" svg:y="5cm">
          <text:p text:style-name="P4"><text:span text:style-name="T16">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5" draw:style-name="gr8" draw:text-style-name="P9" draw:layer="layout" svg:width="3.982cm" svg:height="1.323cm" svg:x="2.737cm" svg:y="4.9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87" draw:text-style-name="P5" draw:layer="layout" svg:width="3.898cm" svg:height="1.296cm" svg:x="2.779cm" svg:y="5cm">
          <text:p text:style-name="P4"><text:span text:style-name="T16">Small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7" draw:style-name="gr8" draw:text-style-name="P9" draw:layer="layout" svg:width="5.395cm" svg:height="1.323cm" svg:x="6.72cm" svg:y="4.9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88" draw:text-style-name="P5" draw:layer="layout" svg:width="5.312cm" svg:height="1.296cm" svg:x="6.761cm" svg:y="5cm">
          <text:p text:style-name="P4"><text:span text:style-name="T16">tiny object-to-image rat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9" draw:style-name="gr8" draw:text-style-name="P9" draw:layer="layout" svg:width="1.669cm" svg:height="1.323cm" svg:x="1.067cm" svg:y="6.3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89" draw:text-style-name="P5" draw:layer="layout" svg:width="1.586cm" svg:height="1.296cm" svg:x="1.108cm" svg:y="6.324cm">
          <text:p text:style-name="P4"><text:span text:style-name="T16">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1" draw:style-name="gr8" draw:text-style-name="P9" draw:layer="layout" svg:width="3.982cm" svg:height="1.323cm" svg:x="2.737cm" svg:y="6.3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90" draw:text-style-name="P5" draw:layer="layout" svg:width="3.898cm" svg:height="1.296cm" svg:x="2.779cm" svg:y="6.324cm">
          <text:p text:style-name="P4"><text:span text:style-name="T16">Object Oc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3" draw:style-name="gr8" draw:text-style-name="P9" draw:layer="layout" svg:width="5.395cm" svg:height="1.323cm" svg:x="6.72cm" svg:y="6.3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91" draw:text-style-name="P5" draw:layer="layout" svg:width="5.312cm" svg:height="1.296cm" svg:x="6.761cm" svg:y="6.324cm">
          <text:p text:style-name="P4"><text:span text:style-name="T16">partial visi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5" draw:style-name="gr8" draw:text-style-name="P9" draw:layer="layout" svg:width="1.669cm" svg:height="1.323cm" svg:x="1.067cm" svg:y="7.6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92" draw:text-style-name="P5" draw:layer="layout" svg:width="1.586cm" svg:height="1.296cm" svg:x="1.108cm" svg:y="7.648cm">
          <text:p text:style-name="P4"><text:span text:style-name="T16">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7" draw:style-name="gr8" draw:text-style-name="P9" draw:layer="layout" svg:width="3.982cm" svg:height="1.323cm" svg:x="2.737cm" svg:y="7.6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93" draw:text-style-name="P5" draw:layer="layout" svg:width="3.898cm" svg:height="1.296cm" svg:x="2.779cm" svg:y="7.648cm">
          <text:p text:style-name="P4"><text:span text:style-name="T16">Background Simila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9" draw:style-name="gr8" draw:text-style-name="P9" draw:layer="layout" svg:width="5.395cm" svg:height="1.323cm" svg:x="6.72cm" svg:y="7.6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94" draw:text-style-name="P5" draw:layer="layout" svg:width="5.312cm" svg:height="1.296cm" svg:x="6.761cm" svg:y="7.648cm">
          <text:p text:style-name="P4"><text:span text:style-name="T16">weak RGB contr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1" draw:style-name="gr8" draw:text-style-name="P9" draw:layer="layout" svg:width="1.669cm" svg:height="1.323cm" svg:x="1.067cm" svg:y="8.95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95" draw:text-style-name="P5" draw:layer="layout" svg:width="1.586cm" svg:height="1.296cm" svg:x="1.108cm" svg:y="8.973cm">
          <text:p text:style-name="P4"><text:span text:style-name="T16">UI/OE/I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3" draw:style-name="gr8" draw:text-style-name="P9" draw:layer="layout" svg:width="3.982cm" svg:height="1.323cm" svg:x="2.737cm" svg:y="8.95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96" draw:text-style-name="P5" draw:layer="layout" svg:width="3.898cm" svg:height="1.296cm" svg:x="2.779cm" svg:y="8.973cm">
          <text:p text:style-name="P4"><text:span text:style-name="T16">Extreme Illumin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5" draw:style-name="gr8" draw:text-style-name="P9" draw:layer="layout" svg:width="5.395cm" svg:height="1.323cm" svg:x="6.72cm" svg:y="8.95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97" draw:text-style-name="P5" draw:layer="layout" svg:width="5.312cm" svg:height="1.296cm" svg:x="6.761cm" svg:y="8.973cm">
          <text:p text:style-name="P4"><text:span text:style-name="T16">lighting inst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7" draw:style-name="gr8" draw:text-style-name="P9" draw:layer="layout" svg:width="1.669cm" svg:height="1.323cm" svg:x="1.067cm" svg:y="10.28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98" draw:text-style-name="P5" draw:layer="layout" svg:width="1.586cm" svg:height="1.296cm" svg:x="1.108cm" svg:y="10.297cm">
          <text:p text:style-name="P4"><text:span text:style-name="T16">C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9" draw:style-name="gr8" draw:text-style-name="P9" draw:layer="layout" svg:width="3.982cm" svg:height="1.323cm" svg:x="2.737cm" svg:y="10.28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99" draw:text-style-name="P5" draw:layer="layout" svg:width="3.898cm" svg:height="1.296cm" svg:x="2.779cm" svg:y="10.297cm">
          <text:p text:style-name="P4"><text:span text:style-name="T16">Complex Backgr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1" draw:style-name="gr8" draw:text-style-name="P9" draw:layer="layout" svg:width="5.395cm" svg:height="1.323cm" svg:x="6.72cm" svg:y="10.28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100" draw:text-style-name="P5" draw:layer="layout" svg:width="5.312cm" svg:height="1.296cm" svg:x="6.761cm" svg:y="10.297cm">
          <text:p text:style-name="P4"><text:span text:style-name="T16">distractors and clu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101" draw:text-style-name="P13" draw:layer="layout" svg:width="10cm" svg:height="5.714cm" svg:x="12.97cm" svg:y="2.413cm">
          <draw:image xlink:href="Pictures/100000010000041A00000258BFB04B3A.png" xlink:type="simple" xlink:show="embed" xlink:actuate="onLoad" draw:mime-type="image/png">
            <text:p/>
          </draw:image>
        </draw:frame>
        <draw:frame draw:name="Picture 55" draw:style-name="gr101" draw:text-style-name="P13" draw:layer="layout" svg:width="5.028cm" svg:height="4.19cm" svg:x="15.456cm" svg:y="8.077cm">
          <draw:image xlink:href="Pictures/1000000100000384000002EE7E66ACDF.png" xlink:type="simple" xlink:show="embed" xlink:actuate="onLoad" draw:mime-type="image/png">
            <text:p/>
          </draw:image>
        </draw:frame>
        <presentation:notes draw:style-name="dp2">
          <draw:page-thumbnail draw:style-name="gr18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2" draw:text-style-name="P5" draw:layer="layout" svg:width="19.303cm" svg:height="1.066cm" svg:x="0.711cm" svg:y="0.457cm">
          <text:p text:style-name="P4"><text:span text:style-name="T2">Paper Review: Official Baseline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3" draw:text-style-name="P7" draw:layer="layout" svg:width="3.428cm" svg:height="0.71cm" svg:x="20.955cm" svg:y="0.559cm">
          <text:p text:style-name="P6"><text:span text:style-name="T3">05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4" draw:text-style-name="P5" draw:layer="layout" svg:width="21.589cm" svg:height="0.634cm" svg:x="0.762cm" svg:y="1.473cm">
          <text:p text:style-name="P4"><text:span text:style-name="T3">11 COD methods adapted from RGB input to 8-channel MSI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" draw:style-name="gr33" draw:text-style-name="P3" draw:layer="layout" svg:width="5.291cm" svg:height="0.729cm" svg:x="0.762cm" svg:y="2.2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5" draw:text-style-name="P5" draw:layer="layout" svg:width="5.208cm" svg:height="0.701cm" svg:x="0.804cm" svg:y="2.249cm">
          <text:p text:style-name="P4"><text:span text:style-name="T17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" draw:style-name="gr33" draw:text-style-name="P3" draw:layer="layout" svg:width="5.291cm" svg:height="0.729cm" svg:x="6.054cm" svg:y="2.2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6" draw:text-style-name="P5" draw:layer="layout" svg:width="5.208cm" svg:height="0.701cm" svg:x="6.096cm" svg:y="2.249cm">
          <text:p text:style-name="P4"><text:span text:style-name="T17">Ven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5" draw:style-name="gr33" draw:text-style-name="P3" draw:layer="layout" svg:width="2.852cm" svg:height="0.729cm" svg:x="11.346cm" svg:y="2.2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07" draw:text-style-name="P5" draw:layer="layout" svg:width="2.769cm" svg:height="0.701cm" svg:x="11.388cm" svg:y="2.249cm">
          <text:p text:style-name="P4"><text:span text:style-name="T17">E 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7" draw:style-name="gr33" draw:text-style-name="P3" draw:layer="layout" svg:width="2.852cm" svg:height="0.729cm" svg:x="14.199cm" svg:y="2.2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08" draw:text-style-name="P5" draw:layer="layout" svg:width="2.769cm" svg:height="0.701cm" svg:x="14.241cm" svg:y="2.249cm">
          <text:p text:style-name="P4"><text:span text:style-name="T17">S 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9" draw:style-name="gr33" draw:text-style-name="P3" draw:layer="layout" svg:width="2.852cm" svg:height="0.729cm" svg:x="17.052cm" svg:y="2.2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09" draw:text-style-name="P5" draw:layer="layout" svg:width="2.769cm" svg:height="0.701cm" svg:x="17.094cm" svg:y="2.249cm">
          <text:p text:style-name="P4"><text:span text:style-name="T17">F 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1" draw:style-name="gr33" draw:text-style-name="P3" draw:layer="layout" svg:width="3.588cm" svg:height="0.729cm" svg:x="19.906cm" svg:y="2.2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10" draw:text-style-name="P5" draw:layer="layout" svg:width="3.505cm" svg:height="0.701cm" svg:x="19.947cm" svg:y="2.249cm">
          <text:p text:style-name="P4"><text:span text:style-name="T17">MAE d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3" draw:style-name="gr8" draw:text-style-name="P9" draw:layer="layout" svg:width="5.291cm" svg:height="0.729cm" svg:x="0.762cm" svg:y="2.96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11" draw:text-style-name="P5" draw:layer="layout" svg:width="5.208cm" svg:height="0.701cm" svg:x="0.804cm" svg:y="2.979cm">
          <text:p text:style-name="P4"><text:span text:style-name="T18">SI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5" draw:style-name="gr8" draw:text-style-name="P9" draw:layer="layout" svg:width="5.291cm" svg:height="0.729cm" svg:x="6.054cm" svg:y="2.96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12" draw:text-style-name="P5" draw:layer="layout" svg:width="5.208cm" svg:height="0.701cm" svg:x="6.096cm" svg:y="2.979cm">
          <text:p text:style-name="P4"><text:span text:style-name="T18">CVPR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7" draw:style-name="gr8" draw:text-style-name="P9" draw:layer="layout" svg:width="2.852cm" svg:height="0.729cm" svg:x="11.346cm" svg:y="2.96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13" draw:text-style-name="P5" draw:layer="layout" svg:width="2.769cm" svg:height="0.701cm" svg:x="11.388cm" svg:y="2.979cm">
          <text:p text:style-name="P4"><text:span text:style-name="T18">.75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9" draw:style-name="gr8" draw:text-style-name="P9" draw:layer="layout" svg:width="2.852cm" svg:height="0.729cm" svg:x="14.199cm" svg:y="2.96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14" draw:text-style-name="P5" draw:layer="layout" svg:width="2.769cm" svg:height="0.701cm" svg:x="14.241cm" svg:y="2.979cm">
          <text:p text:style-name="P4"><text:span text:style-name="T18">.6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1" draw:style-name="gr8" draw:text-style-name="P9" draw:layer="layout" svg:width="2.852cm" svg:height="0.729cm" svg:x="17.052cm" svg:y="2.96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15" draw:text-style-name="P5" draw:layer="layout" svg:width="2.769cm" svg:height="0.701cm" svg:x="17.094cm" svg:y="2.979cm">
          <text:p text:style-name="P4"><text:span text:style-name="T18">.36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3" draw:style-name="gr8" draw:text-style-name="P9" draw:layer="layout" svg:width="3.588cm" svg:height="0.729cm" svg:x="19.906cm" svg:y="2.96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16" draw:text-style-name="P5" draw:layer="layout" svg:width="3.505cm" svg:height="0.701cm" svg:x="19.947cm" svg:y="2.979cm">
          <text:p text:style-name="P4"><text:span text:style-name="T18">.0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5" draw:style-name="gr8" draw:text-style-name="P9" draw:layer="layout" svg:width="5.291cm" svg:height="0.729cm" svg:x="0.762cm" svg:y="3.69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17" draw:text-style-name="P5" draw:layer="layout" svg:width="5.208cm" svg:height="0.701cm" svg:x="0.804cm" svg:y="3.71cm">
          <text:p text:style-name="P4"><text:span text:style-name="T18">LS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7" draw:style-name="gr8" draw:text-style-name="P9" draw:layer="layout" svg:width="5.291cm" svg:height="0.729cm" svg:x="6.054cm" svg:y="3.69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18" draw:text-style-name="P5" draw:layer="layout" svg:width="5.208cm" svg:height="0.701cm" svg:x="6.096cm" svg:y="3.71cm">
          <text:p text:style-name="P4"><text:span text:style-name="T18">CVPR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9" draw:style-name="gr8" draw:text-style-name="P9" draw:layer="layout" svg:width="2.852cm" svg:height="0.729cm" svg:x="11.346cm" svg:y="3.69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19" draw:text-style-name="P5" draw:layer="layout" svg:width="2.769cm" svg:height="0.701cm" svg:x="11.388cm" svg:y="3.71cm">
          <text:p text:style-name="P4"><text:span text:style-name="T18">.8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1" draw:style-name="gr8" draw:text-style-name="P9" draw:layer="layout" svg:width="2.852cm" svg:height="0.729cm" svg:x="14.199cm" svg:y="3.69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120" draw:text-style-name="P5" draw:layer="layout" svg:width="2.769cm" svg:height="0.701cm" svg:x="14.241cm" svg:y="3.71cm">
          <text:p text:style-name="P4"><text:span text:style-name="T18">.6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3" draw:style-name="gr8" draw:text-style-name="P9" draw:layer="layout" svg:width="2.852cm" svg:height="0.729cm" svg:x="17.052cm" svg:y="3.69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121" draw:text-style-name="P5" draw:layer="layout" svg:width="2.769cm" svg:height="0.701cm" svg:x="17.094cm" svg:y="3.71cm">
          <text:p text:style-name="P4"><text:span text:style-name="T18">.37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5" draw:style-name="gr8" draw:text-style-name="P9" draw:layer="layout" svg:width="3.588cm" svg:height="0.729cm" svg:x="19.906cm" svg:y="3.69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22" draw:text-style-name="P5" draw:layer="layout" svg:width="3.505cm" svg:height="0.701cm" svg:x="19.947cm" svg:y="3.71cm">
          <text:p text:style-name="P4"><text:span text:style-name="T18">.0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7" draw:style-name="gr8" draw:text-style-name="P9" draw:layer="layout" svg:width="5.291cm" svg:height="0.729cm" svg:x="0.762cm" svg:y="4.42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123" draw:text-style-name="P5" draw:layer="layout" svg:width="5.208cm" svg:height="0.701cm" svg:x="0.804cm" svg:y="4.44cm">
          <text:p text:style-name="P4"><text:span text:style-name="T18">CODC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9" draw:style-name="gr8" draw:text-style-name="P9" draw:layer="layout" svg:width="5.291cm" svg:height="0.729cm" svg:x="6.054cm" svg:y="4.42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124" draw:text-style-name="P5" draw:layer="layout" svg:width="5.208cm" svg:height="0.701cm" svg:x="6.096cm" svg:y="4.44cm">
          <text:p text:style-name="P4"><text:span text:style-name="T18">Sensors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1" draw:style-name="gr8" draw:text-style-name="P9" draw:layer="layout" svg:width="2.852cm" svg:height="0.729cm" svg:x="11.346cm" svg:y="4.42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125" draw:text-style-name="P5" draw:layer="layout" svg:width="2.769cm" svg:height="0.701cm" svg:x="11.388cm" svg:y="4.44cm">
          <text:p text:style-name="P4"><text:span text:style-name="T18">.7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3" draw:style-name="gr8" draw:text-style-name="P9" draw:layer="layout" svg:width="2.852cm" svg:height="0.729cm" svg:x="14.199cm" svg:y="4.42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126" draw:text-style-name="P5" draw:layer="layout" svg:width="2.769cm" svg:height="0.701cm" svg:x="14.241cm" svg:y="4.44cm">
          <text:p text:style-name="P4"><text:span text:style-name="T18">.67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5" draw:style-name="gr8" draw:text-style-name="P9" draw:layer="layout" svg:width="2.852cm" svg:height="0.729cm" svg:x="17.052cm" svg:y="4.42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127" draw:text-style-name="P5" draw:layer="layout" svg:width="2.769cm" svg:height="0.701cm" svg:x="17.094cm" svg:y="4.44cm">
          <text:p text:style-name="P4"><text:span text:style-name="T18">.4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7" draw:style-name="gr8" draw:text-style-name="P9" draw:layer="layout" svg:width="3.588cm" svg:height="0.729cm" svg:x="19.906cm" svg:y="4.42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128" draw:text-style-name="P5" draw:layer="layout" svg:width="3.505cm" svg:height="0.701cm" svg:x="19.947cm" svg:y="4.44cm">
          <text:p text:style-name="P4"><text:span text:style-name="T18">.0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9" draw:style-name="gr8" draw:text-style-name="P9" draw:layer="layout" svg:width="5.291cm" svg:height="0.729cm" svg:x="0.762cm" svg:y="5.1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129" draw:text-style-name="P5" draw:layer="layout" svg:width="5.208cm" svg:height="0.701cm" svg:x="0.804cm" svg:y="5.17cm">
          <text:p text:style-name="P4"><text:span text:style-name="T18">C2F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1" draw:style-name="gr8" draw:text-style-name="P9" draw:layer="layout" svg:width="5.291cm" svg:height="0.729cm" svg:x="6.054cm" svg:y="5.1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130" draw:text-style-name="P5" draw:layer="layout" svg:width="5.208cm" svg:height="0.701cm" svg:x="6.096cm" svg:y="5.17cm">
          <text:p text:style-name="P4"><text:span text:style-name="T18">IJCAI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3" draw:style-name="gr8" draw:text-style-name="P9" draw:layer="layout" svg:width="2.852cm" svg:height="0.729cm" svg:x="11.346cm" svg:y="5.1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131" draw:text-style-name="P5" draw:layer="layout" svg:width="2.769cm" svg:height="0.701cm" svg:x="11.388cm" svg:y="5.17cm">
          <text:p text:style-name="P4"><text:span text:style-name="T18">.7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5" draw:style-name="gr8" draw:text-style-name="P9" draw:layer="layout" svg:width="2.852cm" svg:height="0.729cm" svg:x="14.199cm" svg:y="5.1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132" draw:text-style-name="P5" draw:layer="layout" svg:width="2.769cm" svg:height="0.701cm" svg:x="14.241cm" svg:y="5.17cm">
          <text:p text:style-name="P4"><text:span text:style-name="T18">.7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7" draw:style-name="gr8" draw:text-style-name="P9" draw:layer="layout" svg:width="2.852cm" svg:height="0.729cm" svg:x="17.052cm" svg:y="5.1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" draw:style-name="gr133" draw:text-style-name="P5" draw:layer="layout" svg:width="2.769cm" svg:height="0.701cm" svg:x="17.094cm" svg:y="5.17cm">
          <text:p text:style-name="P4"><text:span text:style-name="T18">.4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9" draw:style-name="gr8" draw:text-style-name="P9" draw:layer="layout" svg:width="3.588cm" svg:height="0.729cm" svg:x="19.906cm" svg:y="5.1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0" draw:style-name="gr134" draw:text-style-name="P5" draw:layer="layout" svg:width="3.505cm" svg:height="0.701cm" svg:x="19.947cm" svg:y="5.17cm">
          <text:p text:style-name="P4"><text:span text:style-name="T18">.0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1" draw:style-name="gr8" draw:text-style-name="P9" draw:layer="layout" svg:width="5.291cm" svg:height="0.729cm" svg:x="0.762cm" svg:y="5.8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2" draw:style-name="gr135" draw:text-style-name="P5" draw:layer="layout" svg:width="5.208cm" svg:height="0.701cm" svg:x="0.804cm" svg:y="5.9cm">
          <text:p text:style-name="P4"><text:span text:style-name="T18">C2FNet-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3" draw:style-name="gr8" draw:text-style-name="P9" draw:layer="layout" svg:width="5.291cm" svg:height="0.729cm" svg:x="6.054cm" svg:y="5.8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4" draw:style-name="gr136" draw:text-style-name="P5" draw:layer="layout" svg:width="5.208cm" svg:height="0.701cm" svg:x="6.096cm" svg:y="5.9cm">
          <text:p text:style-name="P4"><text:span text:style-name="T18">TCSVT 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5" draw:style-name="gr8" draw:text-style-name="P9" draw:layer="layout" svg:width="2.852cm" svg:height="0.729cm" svg:x="11.346cm" svg:y="5.8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6" draw:style-name="gr137" draw:text-style-name="P5" draw:layer="layout" svg:width="2.769cm" svg:height="0.701cm" svg:x="11.388cm" svg:y="5.9cm">
          <text:p text:style-name="P4"><text:span text:style-name="T18">.9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7" draw:style-name="gr8" draw:text-style-name="P9" draw:layer="layout" svg:width="2.852cm" svg:height="0.729cm" svg:x="14.199cm" svg:y="5.8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8" draw:style-name="gr138" draw:text-style-name="P5" draw:layer="layout" svg:width="2.769cm" svg:height="0.701cm" svg:x="14.241cm" svg:y="5.9cm">
          <text:p text:style-name="P4"><text:span text:style-name="T18">.8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9" draw:style-name="gr8" draw:text-style-name="P9" draw:layer="layout" svg:width="2.852cm" svg:height="0.729cm" svg:x="17.052cm" svg:y="5.8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0" draw:style-name="gr139" draw:text-style-name="P5" draw:layer="layout" svg:width="2.769cm" svg:height="0.701cm" svg:x="17.094cm" svg:y="5.9cm">
          <text:p text:style-name="P4"><text:span text:style-name="T18">.6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1" draw:style-name="gr8" draw:text-style-name="P9" draw:layer="layout" svg:width="3.588cm" svg:height="0.729cm" svg:x="19.906cm" svg:y="5.8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2" draw:style-name="gr140" draw:text-style-name="P5" draw:layer="layout" svg:width="3.505cm" svg:height="0.701cm" svg:x="19.947cm" svg:y="5.9cm">
          <text:p text:style-name="P4"><text:span text:style-name="T18">.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3" draw:style-name="gr8" draw:text-style-name="P9" draw:layer="layout" svg:width="5.291cm" svg:height="0.729cm" svg:x="0.762cm" svg:y="6.61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4" draw:style-name="gr141" draw:text-style-name="P5" draw:layer="layout" svg:width="5.208cm" svg:height="0.701cm" svg:x="0.804cm" svg:y="6.631cm">
          <text:p text:style-name="P4"><text:span text:style-name="T18">SINet-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5" draw:style-name="gr8" draw:text-style-name="P9" draw:layer="layout" svg:width="5.291cm" svg:height="0.729cm" svg:x="6.054cm" svg:y="6.61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6" draw:style-name="gr142" draw:text-style-name="P5" draw:layer="layout" svg:width="5.208cm" svg:height="0.701cm" svg:x="6.096cm" svg:y="6.631cm">
          <text:p text:style-name="P4"><text:span text:style-name="T18">TPAMI 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7" draw:style-name="gr8" draw:text-style-name="P9" draw:layer="layout" svg:width="2.852cm" svg:height="0.729cm" svg:x="11.346cm" svg:y="6.61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8" draw:style-name="gr143" draw:text-style-name="P5" draw:layer="layout" svg:width="2.769cm" svg:height="0.701cm" svg:x="11.388cm" svg:y="6.631cm">
          <text:p text:style-name="P4"><text:span text:style-name="T18">.84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9" draw:style-name="gr8" draw:text-style-name="P9" draw:layer="layout" svg:width="2.852cm" svg:height="0.729cm" svg:x="14.199cm" svg:y="6.61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" draw:style-name="gr144" draw:text-style-name="P5" draw:layer="layout" svg:width="2.769cm" svg:height="0.701cm" svg:x="14.241cm" svg:y="6.631cm">
          <text:p text:style-name="P4"><text:span text:style-name="T18">.7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91" draw:style-name="gr8" draw:text-style-name="P9" draw:layer="layout" svg:width="2.852cm" svg:height="0.729cm" svg:x="17.052cm" svg:y="6.61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2" draw:style-name="gr145" draw:text-style-name="P5" draw:layer="layout" svg:width="2.769cm" svg:height="0.701cm" svg:x="17.094cm" svg:y="6.631cm">
          <text:p text:style-name="P4"><text:span text:style-name="T18">.49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93" draw:style-name="gr8" draw:text-style-name="P9" draw:layer="layout" svg:width="3.588cm" svg:height="0.729cm" svg:x="19.906cm" svg:y="6.61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4" draw:style-name="gr146" draw:text-style-name="P5" draw:layer="layout" svg:width="3.505cm" svg:height="0.701cm" svg:x="19.947cm" svg:y="6.631cm">
          <text:p text:style-name="P4"><text:span text:style-name="T18">.0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95" draw:style-name="gr8" draw:text-style-name="P9" draw:layer="layout" svg:width="5.291cm" svg:height="0.729cm" svg:x="0.762cm" svg:y="7.3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6" draw:style-name="gr147" draw:text-style-name="P5" draw:layer="layout" svg:width="5.208cm" svg:height="0.701cm" svg:x="0.804cm" svg:y="7.361cm">
          <text:p text:style-name="P4"><text:span text:style-name="T18">ASB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97" draw:style-name="gr8" draw:text-style-name="P9" draw:layer="layout" svg:width="5.291cm" svg:height="0.729cm" svg:x="6.054cm" svg:y="7.3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8" draw:style-name="gr148" draw:text-style-name="P5" draw:layer="layout" svg:width="5.208cm" svg:height="0.701cm" svg:x="6.096cm" svg:y="7.361cm">
          <text:p text:style-name="P4"><text:span text:style-name="T18">CVIU 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99" draw:style-name="gr8" draw:text-style-name="P9" draw:layer="layout" svg:width="2.852cm" svg:height="0.729cm" svg:x="11.346cm" svg:y="7.3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0" draw:style-name="gr149" draw:text-style-name="P5" draw:layer="layout" svg:width="2.769cm" svg:height="0.701cm" svg:x="11.388cm" svg:y="7.361cm">
          <text:p text:style-name="P4"><text:span text:style-name="T18">.68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01" draw:style-name="gr8" draw:text-style-name="P9" draw:layer="layout" svg:width="2.852cm" svg:height="0.729cm" svg:x="14.199cm" svg:y="7.3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2" draw:style-name="gr150" draw:text-style-name="P5" draw:layer="layout" svg:width="2.769cm" svg:height="0.701cm" svg:x="14.241cm" svg:y="7.361cm">
          <text:p text:style-name="P4"><text:span text:style-name="T18">.67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03" draw:style-name="gr8" draw:text-style-name="P9" draw:layer="layout" svg:width="2.852cm" svg:height="0.729cm" svg:x="17.052cm" svg:y="7.3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4" draw:style-name="gr151" draw:text-style-name="P5" draw:layer="layout" svg:width="2.769cm" svg:height="0.701cm" svg:x="17.094cm" svg:y="7.361cm">
          <text:p text:style-name="P4"><text:span text:style-name="T18">.37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05" draw:style-name="gr8" draw:text-style-name="P9" draw:layer="layout" svg:width="3.588cm" svg:height="0.729cm" svg:x="19.906cm" svg:y="7.3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6" draw:style-name="gr152" draw:text-style-name="P5" draw:layer="layout" svg:width="3.505cm" svg:height="0.701cm" svg:x="19.947cm" svg:y="7.361cm">
          <text:p text:style-name="P4"><text:span text:style-name="T18">.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07" draw:style-name="gr8" draw:text-style-name="P9" draw:layer="layout" svg:width="5.291cm" svg:height="0.729cm" svg:x="0.762cm" svg:y="8.0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8" draw:style-name="gr153" draw:text-style-name="P5" draw:layer="layout" svg:width="5.208cm" svg:height="0.701cm" svg:x="0.804cm" svg:y="8.091cm">
          <text:p text:style-name="P4"><text:span text:style-name="T18">FI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09" draw:style-name="gr8" draw:text-style-name="P9" draw:layer="layout" svg:width="5.291cm" svg:height="0.729cm" svg:x="6.054cm" svg:y="8.0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0" draw:style-name="gr154" draw:text-style-name="P5" draw:layer="layout" svg:width="5.208cm" svg:height="0.701cm" svg:x="6.096cm" svg:y="8.091cm">
          <text:p text:style-name="P4"><text:span text:style-name="T18">TVC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1" draw:style-name="gr8" draw:text-style-name="P9" draw:layer="layout" svg:width="2.852cm" svg:height="0.729cm" svg:x="11.346cm" svg:y="8.0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2" draw:style-name="gr155" draw:text-style-name="P5" draw:layer="layout" svg:width="2.769cm" svg:height="0.701cm" svg:x="11.388cm" svg:y="8.091cm">
          <text:p text:style-name="P4"><text:span text:style-name="T18">.88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3" draw:style-name="gr8" draw:text-style-name="P9" draw:layer="layout" svg:width="2.852cm" svg:height="0.729cm" svg:x="14.199cm" svg:y="8.0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4" draw:style-name="gr156" draw:text-style-name="P5" draw:layer="layout" svg:width="2.769cm" svg:height="0.701cm" svg:x="14.241cm" svg:y="8.091cm">
          <text:p text:style-name="P4"><text:span text:style-name="T18">.73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5" draw:style-name="gr8" draw:text-style-name="P9" draw:layer="layout" svg:width="2.852cm" svg:height="0.729cm" svg:x="17.052cm" svg:y="8.0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6" draw:style-name="gr157" draw:text-style-name="P5" draw:layer="layout" svg:width="2.769cm" svg:height="0.701cm" svg:x="17.094cm" svg:y="8.091cm">
          <text:p text:style-name="P4"><text:span text:style-name="T18">.53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7" draw:style-name="gr8" draw:text-style-name="P9" draw:layer="layout" svg:width="3.588cm" svg:height="0.729cm" svg:x="19.906cm" svg:y="8.0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8" draw:style-name="gr158" draw:text-style-name="P5" draw:layer="layout" svg:width="3.505cm" svg:height="0.701cm" svg:x="19.947cm" svg:y="8.091cm">
          <text:p text:style-name="P4"><text:span text:style-name="T18">.0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9" draw:style-name="gr8" draw:text-style-name="P9" draw:layer="layout" svg:width="5.291cm" svg:height="0.729cm" svg:x="0.762cm" svg:y="8.8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0" draw:style-name="gr159" draw:text-style-name="P5" draw:layer="layout" svg:width="5.208cm" svg:height="0.701cm" svg:x="0.804cm" svg:y="8.821cm">
          <text:p text:style-name="P4"><text:span text:style-name="T18">P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21" draw:style-name="gr8" draw:text-style-name="P9" draw:layer="layout" svg:width="5.291cm" svg:height="0.729cm" svg:x="6.054cm" svg:y="8.8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2" draw:style-name="gr160" draw:text-style-name="P5" draw:layer="layout" svg:width="5.208cm" svg:height="0.701cm" svg:x="6.096cm" svg:y="8.821cm">
          <text:p text:style-name="P4"><text:span text:style-name="T18">TCSVT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23" draw:style-name="gr8" draw:text-style-name="P9" draw:layer="layout" svg:width="2.852cm" svg:height="0.729cm" svg:x="11.346cm" svg:y="8.8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4" draw:style-name="gr161" draw:text-style-name="P5" draw:layer="layout" svg:width="2.769cm" svg:height="0.701cm" svg:x="11.388cm" svg:y="8.821cm">
          <text:p text:style-name="P4"><text:span text:style-name="T18">.9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25" draw:style-name="gr8" draw:text-style-name="P9" draw:layer="layout" svg:width="2.852cm" svg:height="0.729cm" svg:x="14.199cm" svg:y="8.8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6" draw:style-name="gr162" draw:text-style-name="P5" draw:layer="layout" svg:width="2.769cm" svg:height="0.701cm" svg:x="14.241cm" svg:y="8.821cm">
          <text:p text:style-name="P4"><text:span text:style-name="T18">.8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27" draw:style-name="gr8" draw:text-style-name="P9" draw:layer="layout" svg:width="2.852cm" svg:height="0.729cm" svg:x="17.052cm" svg:y="8.8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8" draw:style-name="gr163" draw:text-style-name="P5" draw:layer="layout" svg:width="2.769cm" svg:height="0.701cm" svg:x="17.094cm" svg:y="8.821cm">
          <text:p text:style-name="P4"><text:span text:style-name="T18">.69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29" draw:style-name="gr8" draw:text-style-name="P9" draw:layer="layout" svg:width="3.588cm" svg:height="0.729cm" svg:x="19.906cm" svg:y="8.8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0" draw:style-name="gr164" draw:text-style-name="P5" draw:layer="layout" svg:width="3.505cm" svg:height="0.701cm" svg:x="19.947cm" svg:y="8.821cm">
          <text:p text:style-name="P4"><text:span text:style-name="T18">.0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1" draw:style-name="gr8" draw:text-style-name="P9" draw:layer="layout" svg:width="5.291cm" svg:height="0.729cm" svg:x="0.762cm" svg:y="9.5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2" draw:style-name="gr165" draw:text-style-name="P5" draw:layer="layout" svg:width="5.208cm" svg:height="0.701cm" svg:x="0.804cm" svg:y="9.552cm">
          <text:p text:style-name="P4"><text:span text:style-name="T18">Ide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3" draw:style-name="gr8" draw:text-style-name="P9" draw:layer="layout" svg:width="5.291cm" svg:height="0.729cm" svg:x="6.054cm" svg:y="9.5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4" draw:style-name="gr166" draw:text-style-name="P5" draw:layer="layout" svg:width="5.208cm" svg:height="0.701cm" svg:x="6.096cm" svg:y="9.552cm">
          <text:p text:style-name="P4"><text:span text:style-name="T18">TIP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5" draw:style-name="gr8" draw:text-style-name="P9" draw:layer="layout" svg:width="2.852cm" svg:height="0.729cm" svg:x="11.346cm" svg:y="9.5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6" draw:style-name="gr167" draw:text-style-name="P5" draw:layer="layout" svg:width="2.769cm" svg:height="0.701cm" svg:x="11.388cm" svg:y="9.552cm">
          <text:p text:style-name="P4"><text:span text:style-name="T18">.84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7" draw:style-name="gr8" draw:text-style-name="P9" draw:layer="layout" svg:width="2.852cm" svg:height="0.729cm" svg:x="14.199cm" svg:y="9.5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8" draw:style-name="gr168" draw:text-style-name="P5" draw:layer="layout" svg:width="2.769cm" svg:height="0.701cm" svg:x="14.241cm" svg:y="9.552cm">
          <text:p text:style-name="P4"><text:span text:style-name="T18">.8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9" draw:style-name="gr8" draw:text-style-name="P9" draw:layer="layout" svg:width="2.852cm" svg:height="0.729cm" svg:x="17.052cm" svg:y="9.5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0" draw:style-name="gr169" draw:text-style-name="P5" draw:layer="layout" svg:width="2.769cm" svg:height="0.701cm" svg:x="17.094cm" svg:y="9.552cm">
          <text:p text:style-name="P4"><text:span text:style-name="T18">.5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41" draw:style-name="gr8" draw:text-style-name="P9" draw:layer="layout" svg:width="3.588cm" svg:height="0.729cm" svg:x="19.906cm" svg:y="9.53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2" draw:style-name="gr170" draw:text-style-name="P5" draw:layer="layout" svg:width="3.505cm" svg:height="0.701cm" svg:x="19.947cm" svg:y="9.552cm">
          <text:p text:style-name="P4"><text:span text:style-name="T18">.0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43" draw:style-name="gr8" draw:text-style-name="P9" draw:layer="layout" svg:width="5.291cm" svg:height="0.729cm" svg:x="0.762cm" svg:y="10.26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4" draw:style-name="gr171" draw:text-style-name="P5" draw:layer="layout" svg:width="5.208cm" svg:height="0.701cm" svg:x="0.804cm" svg:y="10.282cm">
          <text:p text:style-name="P4"><text:span text:style-name="T18">PC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45" draw:style-name="gr8" draw:text-style-name="P9" draw:layer="layout" svg:width="5.291cm" svg:height="0.729cm" svg:x="6.054cm" svg:y="10.26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6" draw:style-name="gr172" draw:text-style-name="P5" draw:layer="layout" svg:width="5.208cm" svg:height="0.701cm" svg:x="6.096cm" svg:y="10.282cm">
          <text:p text:style-name="P4"><text:span text:style-name="T18">arXiv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47" draw:style-name="gr8" draw:text-style-name="P9" draw:layer="layout" svg:width="2.852cm" svg:height="0.729cm" svg:x="11.346cm" svg:y="10.26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8" draw:style-name="gr173" draw:text-style-name="P5" draw:layer="layout" svg:width="2.769cm" svg:height="0.701cm" svg:x="11.388cm" svg:y="10.282cm">
          <text:p text:style-name="P4"><text:span text:style-name="T18">.6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49" draw:style-name="gr8" draw:text-style-name="P9" draw:layer="layout" svg:width="2.852cm" svg:height="0.729cm" svg:x="14.199cm" svg:y="10.26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0" draw:style-name="gr174" draw:text-style-name="P5" draw:layer="layout" svg:width="2.769cm" svg:height="0.701cm" svg:x="14.241cm" svg:y="10.282cm">
          <text:p text:style-name="P4"><text:span text:style-name="T18">.8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51" draw:style-name="gr8" draw:text-style-name="P9" draw:layer="layout" svg:width="2.852cm" svg:height="0.729cm" svg:x="17.052cm" svg:y="10.26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2" draw:style-name="gr175" draw:text-style-name="P5" draw:layer="layout" svg:width="2.769cm" svg:height="0.701cm" svg:x="17.094cm" svg:y="10.282cm">
          <text:p text:style-name="P4"><text:span text:style-name="T18">.38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53" draw:style-name="gr8" draw:text-style-name="P9" draw:layer="layout" svg:width="3.588cm" svg:height="0.729cm" svg:x="19.906cm" svg:y="10.26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4" draw:style-name="gr176" draw:text-style-name="P5" draw:layer="layout" svg:width="3.505cm" svg:height="0.701cm" svg:x="19.947cm" svg:y="10.282cm">
          <text:p text:style-name="P4"><text:span text:style-name="T18">.0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6" draw:style-name="gr177" draw:text-style-name="P5" draw:layer="layout" svg:width="21.716cm" svg:height="1.066cm" svg:x="1.143cm" svg:y="11.227cm">
          <text:p text:style-name="P4"><text:span text:style-name="T9">Official reading: PRNet leads E/F/MAE, PCNet leads S-measure; strong scores still coexist with hard failure cases under SO, extreme illumination, BS, and C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8" draw:text-style-name="P5" draw:layer="layout" svg:width="19.303cm" svg:height="1.066cm" svg:x="0.711cm" svg:y="0.457cm">
          <text:p text:style-name="P4"><text:span text:style-name="T2">Paper Review: Why Multispectral Hel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79" draw:text-style-name="P7" draw:layer="layout" svg:width="3.428cm" svg:height="0.71cm" svg:x="20.955cm" svg:y="0.559cm">
          <text:p text:style-name="P6"><text:span text:style-name="T3">06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80" draw:text-style-name="P5" draw:layer="layout" svg:width="21.589cm" svg:height="0.634cm" svg:x="0.762cm" svg:y="1.473cm">
          <text:p text:style-name="P4"><text:span text:style-name="T3">Controlled RGB vs MSI comparison from the official pa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01" draw:text-style-name="P13" draw:layer="layout" svg:width="12.191cm" svg:height="5.282cm" svg:x="1.143cm" svg:y="2.438cm">
          <draw:image xlink:href="Pictures/10000000000004B0000002087306D756.png" xlink:type="simple" xlink:show="embed" xlink:actuate="onLoad" draw:mime-type="image/png">
            <text:p/>
          </draw:image>
        </draw:frame>
        <draw:custom-shape draw:name="Box 12" draw:style-name="gr33" draw:text-style-name="P3" draw:layer="layout" svg:width="2.498cm" svg:height="0.888cm" svg:x="13.767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81" draw:text-style-name="P5" draw:layer="layout" svg:width="2.415cm" svg:height="0.86cm" svg:x="13.808cm" svg:y="2.427cm">
          <text:p text:style-name="P4"><text:span text:style-name="T12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4" draw:style-name="gr33" draw:text-style-name="P3" draw:layer="layout" svg:width="1.623cm" svg:height="0.888cm" svg:x="16.266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82" draw:text-style-name="P5" draw:layer="layout" svg:width="1.54cm" svg:height="0.86cm" svg:x="16.307cm" svg:y="2.427cm">
          <text:p text:style-name="P4"><text:span text:style-name="T12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6" draw:style-name="gr33" draw:text-style-name="P3" draw:layer="layout" svg:width="1.198cm" svg:height="0.888cm" svg:x="17.89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83" draw:text-style-name="P5" draw:layer="layout" svg:width="1.115cm" svg:height="0.86cm" svg:x="17.932cm" svg:y="2.427cm">
          <text:p text:style-name="P4"><text:span text:style-name="T12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8" draw:style-name="gr33" draw:text-style-name="P3" draw:layer="layout" svg:width="1.198cm" svg:height="0.888cm" svg:x="19.089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84" draw:text-style-name="P5" draw:layer="layout" svg:width="1.115cm" svg:height="0.86cm" svg:x="19.131cm" svg:y="2.427cm">
          <text:p text:style-name="P4"><text:span text:style-name="T12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0" draw:style-name="gr33" draw:text-style-name="P3" draw:layer="layout" svg:width="1.198cm" svg:height="0.888cm" svg:x="20.289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85" draw:text-style-name="P5" draw:layer="layout" svg:width="1.115cm" svg:height="0.86cm" svg:x="20.331cm" svg:y="2.427cm">
          <text:p text:style-name="P4"><text:span text:style-name="T12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2" draw:style-name="gr33" draw:text-style-name="P3" draw:layer="layout" svg:width="1.548cm" svg:height="0.888cm" svg:x="21.488cm" svg:y="2.4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86" draw:text-style-name="P5" draw:layer="layout" svg:width="1.465cm" svg:height="0.86cm" svg:x="21.53cm" svg:y="2.427cm">
          <text:p text:style-name="P4"><text:span text:style-name="T12">MA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4" draw:style-name="gr8" draw:text-style-name="P9" draw:layer="layout" svg:width="2.498cm" svg:height="0.888cm" svg:x="13.767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87" draw:text-style-name="P5" draw:layer="layout" svg:width="2.415cm" svg:height="0.86cm" svg:x="13.808cm" svg:y="3.316cm">
          <text:p text:style-name="P4"><text:span text:style-name="T13">SI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6" draw:style-name="gr8" draw:text-style-name="P9" draw:layer="layout" svg:width="1.623cm" svg:height="0.888cm" svg:x="16.266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88" draw:text-style-name="P5" draw:layer="layout" svg:width="1.54cm" svg:height="0.86cm" svg:x="16.307cm" svg:y="3.316cm">
          <text:p text:style-name="P4"><text:span text:style-name="T13">RG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8" draw:style-name="gr8" draw:text-style-name="P9" draw:layer="layout" svg:width="1.198cm" svg:height="0.888cm" svg:x="17.89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89" draw:text-style-name="P5" draw:layer="layout" svg:width="1.115cm" svg:height="0.86cm" svg:x="17.932cm" svg:y="3.316cm">
          <text:p text:style-name="P4"><text:span text:style-name="T13">.69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0" draw:style-name="gr8" draw:text-style-name="P9" draw:layer="layout" svg:width="1.198cm" svg:height="0.888cm" svg:x="19.089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90" draw:text-style-name="P5" draw:layer="layout" svg:width="1.115cm" svg:height="0.86cm" svg:x="19.131cm" svg:y="3.316cm">
          <text:p text:style-name="P4"><text:span text:style-name="T13">.6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2" draw:style-name="gr8" draw:text-style-name="P9" draw:layer="layout" svg:width="1.198cm" svg:height="0.888cm" svg:x="20.289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91" draw:text-style-name="P5" draw:layer="layout" svg:width="1.115cm" svg:height="0.86cm" svg:x="20.331cm" svg:y="3.316cm">
          <text:p text:style-name="P4"><text:span text:style-name="T13">.33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4" draw:style-name="gr8" draw:text-style-name="P9" draw:layer="layout" svg:width="1.548cm" svg:height="0.888cm" svg:x="21.488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92" draw:text-style-name="P5" draw:layer="layout" svg:width="1.465cm" svg:height="0.86cm" svg:x="21.53cm" svg:y="3.316cm">
          <text:p text:style-name="P4"><text:span text:style-name="T13">.0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6" draw:style-name="gr8" draw:text-style-name="P9" draw:layer="layout" svg:width="2.498cm" svg:height="0.888cm" svg:x="13.767cm" svg:y="4.19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93" draw:text-style-name="P5" draw:layer="layout" svg:width="2.415cm" svg:height="0.86cm" svg:x="13.808cm" svg:y="4.205cm">
          <text:p text:style-name="P4"><text:span text:style-name="T13">SI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8" draw:style-name="gr8" draw:text-style-name="P9" draw:layer="layout" svg:width="1.623cm" svg:height="0.888cm" svg:x="16.266cm" svg:y="4.19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94" draw:text-style-name="P5" draw:layer="layout" svg:width="1.54cm" svg:height="0.86cm" svg:x="16.307cm" svg:y="4.205cm">
          <text:p text:style-name="P4"><text:span text:style-name="T13">M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0" draw:style-name="gr8" draw:text-style-name="P9" draw:layer="layout" svg:width="1.198cm" svg:height="0.888cm" svg:x="17.89cm" svg:y="4.19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95" draw:text-style-name="P5" draw:layer="layout" svg:width="1.115cm" svg:height="0.86cm" svg:x="17.932cm" svg:y="4.205cm">
          <text:p text:style-name="P4"><text:span text:style-name="T13">.75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2" draw:style-name="gr8" draw:text-style-name="P9" draw:layer="layout" svg:width="1.198cm" svg:height="0.888cm" svg:x="19.089cm" svg:y="4.19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96" draw:text-style-name="P5" draw:layer="layout" svg:width="1.115cm" svg:height="0.86cm" svg:x="19.131cm" svg:y="4.205cm">
          <text:p text:style-name="P4"><text:span text:style-name="T13">.6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4" draw:style-name="gr8" draw:text-style-name="P9" draw:layer="layout" svg:width="1.198cm" svg:height="0.888cm" svg:x="20.289cm" svg:y="4.19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7" draw:text-style-name="P5" draw:layer="layout" svg:width="1.115cm" svg:height="0.86cm" svg:x="20.331cm" svg:y="4.205cm">
          <text:p text:style-name="P4"><text:span text:style-name="T13">.36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6" draw:style-name="gr8" draw:text-style-name="P9" draw:layer="layout" svg:width="1.548cm" svg:height="0.888cm" svg:x="21.488cm" svg:y="4.19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98" draw:text-style-name="P5" draw:layer="layout" svg:width="1.465cm" svg:height="0.86cm" svg:x="21.53cm" svg:y="4.205cm">
          <text:p text:style-name="P4"><text:span text:style-name="T13">.0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8" draw:style-name="gr8" draw:text-style-name="P9" draw:layer="layout" svg:width="2.498cm" svg:height="0.888cm" svg:x="13.767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199" draw:text-style-name="P5" draw:layer="layout" svg:width="2.415cm" svg:height="0.86cm" svg:x="13.808cm" svg:y="5.094cm">
          <text:p text:style-name="P4"><text:span text:style-name="T13">C2FNet-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0" draw:style-name="gr8" draw:text-style-name="P9" draw:layer="layout" svg:width="1.623cm" svg:height="0.888cm" svg:x="16.266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200" draw:text-style-name="P5" draw:layer="layout" svg:width="1.54cm" svg:height="0.86cm" svg:x="16.307cm" svg:y="5.094cm">
          <text:p text:style-name="P4"><text:span text:style-name="T13">RG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2" draw:style-name="gr8" draw:text-style-name="P9" draw:layer="layout" svg:width="1.198cm" svg:height="0.888cm" svg:x="17.89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01" draw:text-style-name="P5" draw:layer="layout" svg:width="1.115cm" svg:height="0.86cm" svg:x="17.932cm" svg:y="5.094cm">
          <text:p text:style-name="P4"><text:span text:style-name="T13">.88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4" draw:style-name="gr8" draw:text-style-name="P9" draw:layer="layout" svg:width="1.198cm" svg:height="0.888cm" svg:x="19.089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02" draw:text-style-name="P5" draw:layer="layout" svg:width="1.115cm" svg:height="0.86cm" svg:x="19.131cm" svg:y="5.094cm">
          <text:p text:style-name="P4"><text:span text:style-name="T13">.74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6" draw:style-name="gr8" draw:text-style-name="P9" draw:layer="layout" svg:width="1.198cm" svg:height="0.888cm" svg:x="20.289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03" draw:text-style-name="P5" draw:layer="layout" svg:width="1.115cm" svg:height="0.86cm" svg:x="20.331cm" svg:y="5.094cm">
          <text:p text:style-name="P4"><text:span text:style-name="T13">.55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8" draw:style-name="gr8" draw:text-style-name="P9" draw:layer="layout" svg:width="1.548cm" svg:height="0.888cm" svg:x="21.488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04" draw:text-style-name="P5" draw:layer="layout" svg:width="1.465cm" svg:height="0.86cm" svg:x="21.53cm" svg:y="5.094cm">
          <text:p text:style-name="P4"><text:span text:style-name="T13">.0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0" draw:style-name="gr8" draw:text-style-name="P9" draw:layer="layout" svg:width="2.498cm" svg:height="0.888cm" svg:x="13.767cm" svg:y="5.96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05" draw:text-style-name="P5" draw:layer="layout" svg:width="2.415cm" svg:height="0.86cm" svg:x="13.808cm" svg:y="5.983cm">
          <text:p text:style-name="P4"><text:span text:style-name="T13">C2FNet-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2" draw:style-name="gr8" draw:text-style-name="P9" draw:layer="layout" svg:width="1.623cm" svg:height="0.888cm" svg:x="16.266cm" svg:y="5.96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3" draw:style-name="gr206" draw:text-style-name="P5" draw:layer="layout" svg:width="1.54cm" svg:height="0.86cm" svg:x="16.307cm" svg:y="5.983cm">
          <text:p text:style-name="P4"><text:span text:style-name="T13">M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4" draw:style-name="gr8" draw:text-style-name="P9" draw:layer="layout" svg:width="1.198cm" svg:height="0.888cm" svg:x="17.89cm" svg:y="5.96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5" draw:style-name="gr207" draw:text-style-name="P5" draw:layer="layout" svg:width="1.115cm" svg:height="0.86cm" svg:x="17.932cm" svg:y="5.983cm">
          <text:p text:style-name="P4"><text:span text:style-name="T13">.9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6" draw:style-name="gr8" draw:text-style-name="P9" draw:layer="layout" svg:width="1.198cm" svg:height="0.888cm" svg:x="19.089cm" svg:y="5.96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7" draw:style-name="gr208" draw:text-style-name="P5" draw:layer="layout" svg:width="1.115cm" svg:height="0.86cm" svg:x="19.131cm" svg:y="5.983cm">
          <text:p text:style-name="P4"><text:span text:style-name="T13">.8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8" draw:style-name="gr8" draw:text-style-name="P9" draw:layer="layout" svg:width="1.198cm" svg:height="0.888cm" svg:x="20.289cm" svg:y="5.96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" draw:style-name="gr209" draw:text-style-name="P5" draw:layer="layout" svg:width="1.115cm" svg:height="0.86cm" svg:x="20.331cm" svg:y="5.983cm">
          <text:p text:style-name="P4"><text:span text:style-name="T13">.6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0" draw:style-name="gr8" draw:text-style-name="P9" draw:layer="layout" svg:width="1.548cm" svg:height="0.888cm" svg:x="21.488cm" svg:y="5.96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1" draw:style-name="gr210" draw:text-style-name="P5" draw:layer="layout" svg:width="1.465cm" svg:height="0.86cm" svg:x="21.53cm" svg:y="5.983cm">
          <text:p text:style-name="P4"><text:span text:style-name="T13">.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2" draw:style-name="gr8" draw:text-style-name="P9" draw:layer="layout" svg:width="2.498cm" svg:height="0.888cm" svg:x="13.767cm" svg:y="6.85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3" draw:style-name="gr211" draw:text-style-name="P5" draw:layer="layout" svg:width="2.415cm" svg:height="0.86cm" svg:x="13.808cm" svg:y="6.872cm">
          <text:p text:style-name="P4"><text:span text:style-name="T13">PC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4" draw:style-name="gr8" draw:text-style-name="P9" draw:layer="layout" svg:width="1.623cm" svg:height="0.888cm" svg:x="16.266cm" svg:y="6.85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5" draw:style-name="gr212" draw:text-style-name="P5" draw:layer="layout" svg:width="1.54cm" svg:height="0.86cm" svg:x="16.307cm" svg:y="6.872cm">
          <text:p text:style-name="P4"><text:span text:style-name="T13">RG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6" draw:style-name="gr8" draw:text-style-name="P9" draw:layer="layout" svg:width="1.198cm" svg:height="0.888cm" svg:x="17.89cm" svg:y="6.85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7" draw:style-name="gr213" draw:text-style-name="P5" draw:layer="layout" svg:width="1.115cm" svg:height="0.86cm" svg:x="17.932cm" svg:y="6.872cm">
          <text:p text:style-name="P4"><text:span text:style-name="T13">.39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78" draw:style-name="gr8" draw:text-style-name="P9" draw:layer="layout" svg:width="1.198cm" svg:height="0.888cm" svg:x="19.089cm" svg:y="6.85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9" draw:style-name="gr214" draw:text-style-name="P5" draw:layer="layout" svg:width="1.115cm" svg:height="0.86cm" svg:x="19.131cm" svg:y="6.872cm">
          <text:p text:style-name="P4"><text:span text:style-name="T13">.7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0" draw:style-name="gr8" draw:text-style-name="P9" draw:layer="layout" svg:width="1.198cm" svg:height="0.888cm" svg:x="20.289cm" svg:y="6.85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1" draw:style-name="gr215" draw:text-style-name="P5" draw:layer="layout" svg:width="1.115cm" svg:height="0.86cm" svg:x="20.331cm" svg:y="6.872cm">
          <text:p text:style-name="P4"><text:span text:style-name="T13">.14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2" draw:style-name="gr8" draw:text-style-name="P9" draw:layer="layout" svg:width="1.548cm" svg:height="0.888cm" svg:x="21.488cm" svg:y="6.85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3" draw:style-name="gr216" draw:text-style-name="P5" draw:layer="layout" svg:width="1.465cm" svg:height="0.86cm" svg:x="21.53cm" svg:y="6.872cm">
          <text:p text:style-name="P4"><text:span text:style-name="T13">.0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4" draw:style-name="gr8" draw:text-style-name="P9" draw:layer="layout" svg:width="2.498cm" svg:height="0.888cm" svg:x="13.767cm" svg:y="7.7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5" draw:style-name="gr217" draw:text-style-name="P5" draw:layer="layout" svg:width="2.415cm" svg:height="0.86cm" svg:x="13.808cm" svg:y="7.761cm">
          <text:p text:style-name="P4"><text:span text:style-name="T13">PC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6" draw:style-name="gr8" draw:text-style-name="P9" draw:layer="layout" svg:width="1.623cm" svg:height="0.888cm" svg:x="16.266cm" svg:y="7.7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7" draw:style-name="gr218" draw:text-style-name="P5" draw:layer="layout" svg:width="1.54cm" svg:height="0.86cm" svg:x="16.307cm" svg:y="7.761cm">
          <text:p text:style-name="P4"><text:span text:style-name="T13">M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88" draw:style-name="gr8" draw:text-style-name="P9" draw:layer="layout" svg:width="1.198cm" svg:height="0.888cm" svg:x="17.89cm" svg:y="7.7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9" draw:style-name="gr219" draw:text-style-name="P5" draw:layer="layout" svg:width="1.115cm" svg:height="0.86cm" svg:x="17.932cm" svg:y="7.761cm">
          <text:p text:style-name="P4"><text:span text:style-name="T13">.6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90" draw:style-name="gr8" draw:text-style-name="P9" draw:layer="layout" svg:width="1.198cm" svg:height="0.888cm" svg:x="19.089cm" svg:y="7.7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1" draw:style-name="gr220" draw:text-style-name="P5" draw:layer="layout" svg:width="1.115cm" svg:height="0.86cm" svg:x="19.131cm" svg:y="7.761cm">
          <text:p text:style-name="P4"><text:span text:style-name="T13">.8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92" draw:style-name="gr8" draw:text-style-name="P9" draw:layer="layout" svg:width="1.198cm" svg:height="0.888cm" svg:x="20.289cm" svg:y="7.7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3" draw:style-name="gr221" draw:text-style-name="P5" draw:layer="layout" svg:width="1.115cm" svg:height="0.86cm" svg:x="20.331cm" svg:y="7.761cm">
          <text:p text:style-name="P4"><text:span text:style-name="T13">.38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94" draw:style-name="gr8" draw:text-style-name="P9" draw:layer="layout" svg:width="1.548cm" svg:height="0.888cm" svg:x="21.488cm" svg:y="7.74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5" draw:style-name="gr222" draw:text-style-name="P5" draw:layer="layout" svg:width="1.465cm" svg:height="0.86cm" svg:x="21.53cm" svg:y="7.761cm">
          <text:p text:style-name="P4"><text:span text:style-name="T13">.0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7" draw:style-name="gr223" draw:text-style-name="P5" draw:layer="layout" svg:width="20.954cm" svg:height="1.777cm" svg:x="1.473cm" svg:y="9.271cm">
          <text:list text:style-name="L5">
            <text:list-item>
              <text:p text:style-name="P4"><text:span text:style-name="T14">The key evidence is consistency: MSI improves most metrics across representative architectures.</text:span></text:p>
            </text:list-item>
            <text:list-item>
              <text:p text:style-name="P4"><text:span text:style-name="T14">Paper example: C2FNet-V2 S_alpha improves 0.743 to 0.810; F_beta improves 0.553 to 0.654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24" draw:text-style-name="P5" draw:layer="layout" svg:width="19.303cm" svg:height="1.066cm" svg:x="0.711cm" svg:y="0.457cm">
          <text:p text:style-name="P4"><text:span text:style-name="T2">This Repo: Research Obj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25" draw:text-style-name="P7" draw:layer="layout" svg:width="3.428cm" svg:height="0.71cm" svg:x="20.955cm" svg:y="0.559cm">
          <text:p text:style-name="P6"><text:span text:style-name="T3">07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26" draw:text-style-name="P5" draw:layer="layout" svg:width="21.589cm" svg:height="0.634cm" svg:x="0.762cm" svg:y="1.473cm">
          <text:p text:style-name="P4"><text:span text:style-name="T3">From MCOD benchmark to promptability and robustness benchma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" draw:style-name="gr22" draw:text-style-name="P11" draw:layer="layout" svg:width="6.857cm" svg:height="8.254cm" svg:x="1.143cm" svg:y="2.41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2" draw:style-name="gr227" draw:text-style-name="P5" draw:layer="layout" svg:width="5.841cm" svg:height="0.812cm" svg:x="1.575cm" svg:y="2.794cm">
          <text:p text:style-name="P4"><text:span text:style-name="T19">Quest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28" draw:text-style-name="P5" draw:layer="layout" svg:width="5.638cm" svg:height="4.19cm" svg:x="1.575cm" svg:y="3.937cm">
          <text:p text:style-name="P4"><text:span text:style-name="T20">Can foundation or RGB-trained segmentation models use MSI-derived views to localize camouflaged object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4" draw:style-name="gr8" draw:text-style-name="P9" draw:layer="layout" svg:width="6.857cm" svg:height="8.254cm" svg:x="8.763cm" svg:y="2.41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5" draw:style-name="gr229" draw:text-style-name="P5" draw:layer="layout" svg:width="5.841cm" svg:height="0.812cm" svg:x="9.195cm" svg:y="2.794cm">
          <text:p text:style-name="P4"><text:span text:style-name="T21">Questio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30" draw:text-style-name="P5" draw:layer="layout" svg:width="5.638cm" svg:height="4.19cm" svg:x="9.195cm" svg:y="3.937cm">
          <text:p text:style-name="P4"><text:span text:style-name="T22">Which spectral views preserve detection evidence: false color, red-edge, NIR, PCA projections, or all-8 tensor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7" draw:style-name="gr27" draw:text-style-name="P12" draw:layer="layout" svg:width="6.857cm" svg:height="8.254cm" svg:x="16.383cm" svg:y="2.41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8" draw:style-name="gr231" draw:text-style-name="P5" draw:layer="layout" svg:width="5.841cm" svg:height="0.812cm" svg:x="16.815cm" svg:y="2.794cm">
          <text:p text:style-name="P4"><text:span text:style-name="T23">Ques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32" draw:text-style-name="P5" draw:layer="layout" svg:width="5.638cm" svg:height="4.19cm" svg:x="16.815cm" svg:y="3.937cm">
          <text:p text:style-name="P4"><text:span text:style-name="T20">How robust are results when spectral bands are degraded, dropped, perturbed, or misalign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33" draw:text-style-name="P5" draw:layer="layout" svg:width="19.303cm" svg:height="1.066cm" svg:x="0.711cm" svg:y="0.457cm">
          <text:p text:style-name="P4"><text:span text:style-name="T2">Data Organization And Corr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34" draw:text-style-name="P7" draw:layer="layout" svg:width="3.428cm" svg:height="0.71cm" svg:x="20.955cm" svg:y="0.559cm">
          <text:p text:style-name="P6"><text:span text:style-name="T3">08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35" draw:text-style-name="P5" draw:layer="layout" svg:width="21.589cm" svg:height="0.634cm" svg:x="0.762cm" svg:y="1.473cm">
          <text:p text:style-name="P4"><text:span text:style-name="T3">Raw MCOD standardized into a clean working 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" draw:style-name="gr33" draw:text-style-name="P3" draw:layer="layout" svg:width="9.337cm" svg:height="1.036cm" svg:x="0.965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36" draw:text-style-name="P5" draw:layer="layout" svg:width="9.254cm" svg:height="1.008cm" svg:x="1.007cm" svg:y="2.351cm">
          <text:p text:style-name="P4"><text:span text:style-name="T12">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" draw:style-name="gr33" draw:text-style-name="P3" draw:layer="layout" svg:width="2.24cm" svg:height="1.036cm" svg:x="10.303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37" draw:text-style-name="P5" draw:layer="layout" svg:width="2.157cm" svg:height="1.008cm" svg:x="10.345cm" svg:y="2.351cm">
          <text:p text:style-name="P4"><text:span text:style-name="T12">Tr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5" draw:style-name="gr33" draw:text-style-name="P3" draw:layer="layout" svg:width="2.24cm" svg:height="1.036cm" svg:x="12.545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38" draw:text-style-name="P5" draw:layer="layout" svg:width="2.157cm" svg:height="1.008cm" svg:x="12.586cm" svg:y="2.351cm">
          <text:p text:style-name="P4"><text:span text:style-name="T12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7" draw:style-name="gr33" draw:text-style-name="P3" draw:layer="layout" svg:width="8.403cm" svg:height="1.036cm" svg:x="14.786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39" draw:text-style-name="P5" draw:layer="layout" svg:width="8.32cm" svg:height="1.008cm" svg:x="14.827cm" svg:y="2.351cm">
          <text:p text:style-name="P4"><text:span text:style-name="T12">R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9" draw:style-name="gr8" draw:text-style-name="P9" draw:layer="layout" svg:width="9.337cm" svg:height="1.036cm" svg:x="0.965cm" svg:y="3.37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40" draw:text-style-name="P5" draw:layer="layout" svg:width="9.254cm" svg:height="1.008cm" svg:x="1.007cm" svg:y="3.388cm">
          <text:p text:style-name="P4"><text:span text:style-name="T13">data/MCOD_raw/*/Pcol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1" draw:style-name="gr8" draw:text-style-name="P9" draw:layer="layout" svg:width="2.24cm" svg:height="1.036cm" svg:x="10.303cm" svg:y="3.37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41" draw:text-style-name="P5" draw:layer="layout" svg:width="2.157cm" svg:height="1.008cm" svg:x="10.345cm" svg:y="3.388cm">
          <text:p text:style-name="P4"><text:span text:style-name="T13">10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3" draw:style-name="gr8" draw:text-style-name="P9" draw:layer="layout" svg:width="2.24cm" svg:height="1.036cm" svg:x="12.545cm" svg:y="3.37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42" draw:text-style-name="P5" draw:layer="layout" svg:width="2.157cm" svg:height="1.008cm" svg:x="12.586cm" svg:y="3.388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5" draw:style-name="gr8" draw:text-style-name="P9" draw:layer="layout" svg:width="8.403cm" svg:height="1.036cm" svg:x="14.786cm" svg:y="3.37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43" draw:text-style-name="P5" draw:layer="layout" svg:width="8.32cm" svg:height="1.008cm" svg:x="14.827cm" svg:y="3.388cm">
          <text:p text:style-name="P4"><text:span text:style-name="T13">official false-color 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7" draw:style-name="gr8" draw:text-style-name="P9" draw:layer="layout" svg:width="9.337cm" svg:height="1.036cm" svg:x="0.965cm" svg:y="4.41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44" draw:text-style-name="P5" draw:layer="layout" svg:width="9.254cm" svg:height="1.008cm" svg:x="1.007cm" svg:y="4.425cm">
          <text:p text:style-name="P4"><text:span text:style-name="T13">data/MCOD_raw/*/G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9" draw:style-name="gr8" draw:text-style-name="P9" draw:layer="layout" svg:width="2.24cm" svg:height="1.036cm" svg:x="10.303cm" svg:y="4.41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245" draw:text-style-name="P5" draw:layer="layout" svg:width="2.157cm" svg:height="1.008cm" svg:x="10.345cm" svg:y="4.425cm">
          <text:p text:style-name="P4"><text:span text:style-name="T13">10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1" draw:style-name="gr8" draw:text-style-name="P9" draw:layer="layout" svg:width="2.24cm" svg:height="1.036cm" svg:x="12.545cm" svg:y="4.41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46" draw:text-style-name="P5" draw:layer="layout" svg:width="2.157cm" svg:height="1.008cm" svg:x="12.586cm" svg:y="4.425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3" draw:style-name="gr8" draw:text-style-name="P9" draw:layer="layout" svg:width="8.403cm" svg:height="1.036cm" svg:x="14.786cm" svg:y="4.41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247" draw:text-style-name="P5" draw:layer="layout" svg:width="8.32cm" svg:height="1.008cm" svg:x="14.827cm" svg:y="4.425cm">
          <text:p text:style-name="P4"><text:span text:style-name="T13">pixel m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5" draw:style-name="gr8" draw:text-style-name="P9" draw:layer="layout" svg:width="9.337cm" svg:height="1.036cm" svg:x="0.965cm" svg:y="5.4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248" draw:text-style-name="P5" draw:layer="layout" svg:width="9.254cm" svg:height="1.008cm" svg:x="1.007cm" svg:y="5.462cm">
          <text:p text:style-name="P4"><text:span text:style-name="T13">data/MCOD_raw/*/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7" draw:style-name="gr8" draw:text-style-name="P9" draw:layer="layout" svg:width="2.24cm" svg:height="1.036cm" svg:x="10.303cm" svg:y="5.4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249" draw:text-style-name="P5" draw:layer="layout" svg:width="2.157cm" svg:height="1.008cm" svg:x="10.345cm" svg:y="5.462cm">
          <text:p text:style-name="P4"><text:span text:style-name="T13">10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9" draw:style-name="gr8" draw:text-style-name="P9" draw:layer="layout" svg:width="2.24cm" svg:height="1.036cm" svg:x="12.545cm" svg:y="5.4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250" draw:text-style-name="P5" draw:layer="layout" svg:width="2.157cm" svg:height="1.008cm" svg:x="12.586cm" svg:y="5.462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1" draw:style-name="gr8" draw:text-style-name="P9" draw:layer="layout" svg:width="8.403cm" svg:height="1.036cm" svg:x="14.786cm" svg:y="5.4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251" draw:text-style-name="P5" draw:layer="layout" svg:width="8.32cm" svg:height="1.008cm" svg:x="14.827cm" svg:y="5.462cm">
          <text:p text:style-name="P4"><text:span text:style-name="T13">8-band gray cub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3" draw:style-name="gr8" draw:text-style-name="P9" draw:layer="layout" svg:width="9.337cm" svg:height="1.036cm" svg:x="0.965cm" svg:y="6.48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252" draw:text-style-name="P5" draw:layer="layout" svg:width="9.254cm" svg:height="1.008cm" svg:x="1.007cm" svg:y="6.499cm">
          <text:p text:style-name="P4"><text:span text:style-name="T13">data/MCOD_resized/*/Pcol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5" draw:style-name="gr8" draw:text-style-name="P9" draw:layer="layout" svg:width="2.24cm" svg:height="1.036cm" svg:x="10.303cm" svg:y="6.48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253" draw:text-style-name="P5" draw:layer="layout" svg:width="2.157cm" svg:height="1.008cm" svg:x="10.345cm" svg:y="6.499cm">
          <text:p text:style-name="P4"><text:span text:style-name="T13">10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7" draw:style-name="gr8" draw:text-style-name="P9" draw:layer="layout" svg:width="2.24cm" svg:height="1.036cm" svg:x="12.545cm" svg:y="6.48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254" draw:text-style-name="P5" draw:layer="layout" svg:width="2.157cm" svg:height="1.008cm" svg:x="12.586cm" svg:y="6.499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9" draw:style-name="gr8" draw:text-style-name="P9" draw:layer="layout" svg:width="8.403cm" svg:height="1.036cm" svg:x="14.786cm" svg:y="6.48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255" draw:text-style-name="P5" draw:layer="layout" svg:width="8.32cm" svg:height="1.008cm" svg:x="14.827cm" svg:y="6.499cm">
          <text:p text:style-name="P4"><text:span text:style-name="T13">uniform 1140x8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1" draw:style-name="gr8" draw:text-style-name="P9" draw:layer="layout" svg:width="9.337cm" svg:height="1.036cm" svg:x="0.965cm" svg:y="7.52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256" draw:text-style-name="P5" draw:layer="layout" svg:width="9.254cm" svg:height="1.008cm" svg:x="1.007cm" svg:y="7.537cm">
          <text:p text:style-name="P4"><text:span text:style-name="T13">data/MCOD_resized/*/G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3" draw:style-name="gr8" draw:text-style-name="P9" draw:layer="layout" svg:width="2.24cm" svg:height="1.036cm" svg:x="10.303cm" svg:y="7.52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257" draw:text-style-name="P5" draw:layer="layout" svg:width="2.157cm" svg:height="1.008cm" svg:x="10.345cm" svg:y="7.537cm">
          <text:p text:style-name="P4"><text:span text:style-name="T13">10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5" draw:style-name="gr8" draw:text-style-name="P9" draw:layer="layout" svg:width="2.24cm" svg:height="1.036cm" svg:x="12.545cm" svg:y="7.52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258" draw:text-style-name="P5" draw:layer="layout" svg:width="2.157cm" svg:height="1.008cm" svg:x="12.586cm" svg:y="7.537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7" draw:style-name="gr8" draw:text-style-name="P9" draw:layer="layout" svg:width="8.403cm" svg:height="1.036cm" svg:x="14.786cm" svg:y="7.52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259" draw:text-style-name="P5" draw:layer="layout" svg:width="8.32cm" svg:height="1.008cm" svg:x="14.827cm" svg:y="7.537cm">
          <text:p text:style-name="P4"><text:span text:style-name="T13">uniform 1140x8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260" draw:text-style-name="P5" draw:layer="layout" svg:width="21.081cm" svg:height="1.726cm" svg:x="1.321cm" svg:y="9.195cm">
          <text:list text:style-name="L5">
            <text:list-item>
              <text:p text:style-name="P4"><text:span text:style-name="T9">Resolution repair performed in a separate folder to preserve raw data.</text:span></text:p>
            </text:list-item>
            <text:list-item>
              <text:p text:style-name="P4"><text:span text:style-name="T9">Final resolution summary: Pcolor 1527 at 1140x860; GT 1527 at 1140x860.</text:span></text:p>
            </text:list-item>
            <text:list-item>
              <text:p text:style-name="P4"><text:span text:style-name="T9">Recent code change: process_mask now copies official masks unchanged rather than binarizing label valu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61" draw:text-style-name="P5" draw:layer="layout" svg:width="19.303cm" svg:height="1.066cm" svg:x="0.711cm" svg:y="0.457cm">
          <text:p text:style-name="P4"><text:span text:style-name="T2">Audit Results: Dataset Integ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62" draw:text-style-name="P7" draw:layer="layout" svg:width="3.428cm" svg:height="0.71cm" svg:x="20.955cm" svg:y="0.559cm">
          <text:p text:style-name="P6"><text:span text:style-name="T3">09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63" draw:text-style-name="P5" draw:layer="layout" svg:width="21.589cm" svg:height="0.634cm" svg:x="0.762cm" svg:y="1.473cm">
          <text:p text:style-name="P4"><text:span text:style-name="T3">Quality gates before any model-level cla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" draw:style-name="gr33" draw:text-style-name="P3" draw:layer="layout" svg:width="5.614cm" svg:height="1.031cm" svg:x="1.016cm" svg:y="2.2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64" draw:text-style-name="P5" draw:layer="layout" svg:width="5.531cm" svg:height="1.003cm" svg:x="1.058cm" svg:y="2.3cm">
          <text:p text:style-name="P4"><text:span text:style-name="T15">Che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" draw:style-name="gr33" draw:text-style-name="P3" draw:layer="layout" svg:width="5.252cm" svg:height="1.031cm" svg:x="6.631cm" svg:y="2.2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65" draw:text-style-name="P5" draw:layer="layout" svg:width="5.168cm" svg:height="1.003cm" svg:x="6.673cm" svg:y="2.3cm">
          <text:p text:style-name="P4"><text:span text:style-name="T15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5" draw:style-name="gr33" draw:text-style-name="P3" draw:layer="layout" svg:width="11.229cm" svg:height="1.031cm" svg:x="11.884cm" svg:y="2.2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66" draw:text-style-name="P5" draw:layer="layout" svg:width="11.146cm" svg:height="1.003cm" svg:x="11.926cm" svg:y="2.3cm">
          <text:p text:style-name="P4"><text:span text:style-name="T15">Interpre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7" draw:style-name="gr8" draw:text-style-name="P9" draw:layer="layout" svg:width="5.614cm" svg:height="1.031cm" svg:x="1.016cm" svg:y="3.31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67" draw:text-style-name="P5" draw:layer="layout" svg:width="5.531cm" svg:height="1.003cm" svg:x="1.058cm" svg:y="3.332cm">
          <text:p text:style-name="P4"><text:span text:style-name="T16">Sample 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9" draw:style-name="gr8" draw:text-style-name="P9" draw:layer="layout" svg:width="5.252cm" svg:height="1.031cm" svg:x="6.631cm" svg:y="3.31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68" draw:text-style-name="P5" draw:layer="layout" svg:width="5.168cm" svg:height="1.003cm" svg:x="6.673cm" svg:y="3.332cm">
          <text:p text:style-name="P4"><text:span text:style-name="T16">1527 / 15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1" draw:style-name="gr8" draw:text-style-name="P9" draw:layer="layout" svg:width="11.229cm" svg:height="1.031cm" svg:x="11.884cm" svg:y="3.31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69" draw:text-style-name="P5" draw:layer="layout" svg:width="11.146cm" svg:height="1.003cm" svg:x="11.926cm" svg:y="3.332cm">
          <text:p text:style-name="P4"><text:span text:style-name="T16">matches official dataset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3" draw:style-name="gr8" draw:text-style-name="P9" draw:layer="layout" svg:width="5.614cm" svg:height="1.031cm" svg:x="1.016cm" svg:y="4.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70" draw:text-style-name="P5" draw:layer="layout" svg:width="5.531cm" svg:height="1.003cm" svg:x="1.058cm" svg:y="4.364cm">
          <text:p text:style-name="P4"><text:span text:style-name="T16">Official spl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5" draw:style-name="gr8" draw:text-style-name="P9" draw:layer="layout" svg:width="5.252cm" svg:height="1.031cm" svg:x="6.631cm" svg:y="4.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71" draw:text-style-name="P5" draw:layer="layout" svg:width="5.168cm" svg:height="1.003cm" svg:x="6.673cm" svg:y="4.364cm">
          <text:p text:style-name="P4"><text:span text:style-name="T16">1027 train / 500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7" draw:style-name="gr8" draw:text-style-name="P9" draw:layer="layout" svg:width="11.229cm" svg:height="1.031cm" svg:x="11.884cm" svg:y="4.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72" draw:text-style-name="P5" draw:layer="layout" svg:width="11.146cm" svg:height="1.003cm" svg:x="11.926cm" svg:y="4.364cm">
          <text:p text:style-name="P4"><text:span text:style-name="T16">split is int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9" draw:style-name="gr8" draw:text-style-name="P9" draw:layer="layout" svg:width="5.614cm" svg:height="1.031cm" svg:x="1.016cm" svg:y="5.38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273" draw:text-style-name="P5" draw:layer="layout" svg:width="5.531cm" svg:height="1.003cm" svg:x="1.058cm" svg:y="5.396cm">
          <text:p text:style-name="P4"><text:span text:style-name="T16">Image-mask-Mat 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1" draw:style-name="gr8" draw:text-style-name="P9" draw:layer="layout" svg:width="5.252cm" svg:height="1.031cm" svg:x="6.631cm" svg:y="5.38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74" draw:text-style-name="P5" draw:layer="layout" svg:width="5.168cm" svg:height="1.003cm" svg:x="6.673cm" svg:y="5.396cm">
          <text:p text:style-name="P4"><text:span text:style-name="T16">all equal per spl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3" draw:style-name="gr8" draw:text-style-name="P9" draw:layer="layout" svg:width="11.229cm" svg:height="1.031cm" svg:x="11.884cm" svg:y="5.38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275" draw:text-style-name="P5" draw:layer="layout" svg:width="11.146cm" svg:height="1.003cm" svg:x="11.926cm" svg:y="5.396cm">
          <text:p text:style-name="P4"><text:span text:style-name="T16">sample triples al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5" draw:style-name="gr8" draw:text-style-name="P9" draw:layer="layout" svg:width="5.614cm" svg:height="1.031cm" svg:x="1.016cm" svg:y="6.41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276" draw:text-style-name="P5" draw:layer="layout" svg:width="5.531cm" svg:height="1.003cm" svg:x="1.058cm" svg:y="6.427cm">
          <text:p text:style-name="P4"><text:span text:style-name="T16">Corrupted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7" draw:style-name="gr8" draw:text-style-name="P9" draw:layer="layout" svg:width="5.252cm" svg:height="1.031cm" svg:x="6.631cm" svg:y="6.41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277" draw:text-style-name="P5" draw:layer="layout" svg:width="5.168cm" svg:height="1.003cm" svg:x="6.673cm" svg:y="6.427cm">
          <text:p text:style-name="P4"><text:span text:style-name="T16">0 rows repo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9" draw:style-name="gr8" draw:text-style-name="P9" draw:layer="layout" svg:width="11.229cm" svg:height="1.031cm" svg:x="11.884cm" svg:y="6.41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278" draw:text-style-name="P5" draw:layer="layout" svg:width="11.146cm" svg:height="1.003cm" svg:x="11.926cm" svg:y="6.427cm">
          <text:p text:style-name="P4"><text:span text:style-name="T16">readability check pas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1" draw:style-name="gr8" draw:text-style-name="P9" draw:layer="layout" svg:width="5.614cm" svg:height="1.031cm" svg:x="1.016cm" svg:y="7.44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279" draw:text-style-name="P5" draw:layer="layout" svg:width="5.531cm" svg:height="1.003cm" svg:x="1.058cm" svg:y="7.459cm">
          <text:p text:style-name="P4"><text:span text:style-name="T16">Missing b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3" draw:style-name="gr8" draw:text-style-name="P9" draw:layer="layout" svg:width="5.252cm" svg:height="1.031cm" svg:x="6.631cm" svg:y="7.44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280" draw:text-style-name="P5" draw:layer="layout" svg:width="5.168cm" svg:height="1.003cm" svg:x="6.673cm" svg:y="7.459cm">
          <text:p text:style-name="P4"><text:span text:style-name="T16">0 rows repo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5" draw:style-name="gr8" draw:text-style-name="P9" draw:layer="layout" svg:width="11.229cm" svg:height="1.031cm" svg:x="11.884cm" svg:y="7.44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281" draw:text-style-name="P5" draw:layer="layout" svg:width="11.146cm" svg:height="1.003cm" svg:x="11.926cm" svg:y="7.459cm">
          <text:p text:style-name="P4"><text:span text:style-name="T16">8-band completeness pas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7" draw:style-name="gr8" draw:text-style-name="P9" draw:layer="layout" svg:width="5.614cm" svg:height="1.031cm" svg:x="1.016cm" svg:y="8.4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282" draw:text-style-name="P5" draw:layer="layout" svg:width="5.531cm" svg:height="1.003cm" svg:x="1.058cm" svg:y="8.491cm">
          <text:p text:style-name="P4"><text:span text:style-name="T16">Missing m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9" draw:style-name="gr8" draw:text-style-name="P9" draw:layer="layout" svg:width="5.252cm" svg:height="1.031cm" svg:x="6.631cm" svg:y="8.4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283" draw:text-style-name="P5" draw:layer="layout" svg:width="5.168cm" svg:height="1.003cm" svg:x="6.673cm" svg:y="8.491cm">
          <text:p text:style-name="P4"><text:span text:style-name="T16">0 rows repo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1" draw:style-name="gr8" draw:text-style-name="P9" draw:layer="layout" svg:width="11.229cm" svg:height="1.031cm" svg:x="11.884cm" svg:y="8.4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284" draw:text-style-name="P5" draw:layer="layout" svg:width="11.146cm" svg:height="1.003cm" svg:x="11.926cm" svg:y="8.491cm">
          <text:p text:style-name="P4"><text:span text:style-name="T16">mask linkage pas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3" draw:style-name="gr8" draw:text-style-name="P9" draw:layer="layout" svg:width="5.614cm" svg:height="1.031cm" svg:x="1.016cm" svg:y="9.50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285" draw:text-style-name="P5" draw:layer="layout" svg:width="5.531cm" svg:height="1.003cm" svg:x="1.058cm" svg:y="9.523cm">
          <text:p text:style-name="P4"><text:span text:style-name="T16">Train-test lea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5" draw:style-name="gr8" draw:text-style-name="P9" draw:layer="layout" svg:width="5.252cm" svg:height="1.031cm" svg:x="6.631cm" svg:y="9.50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286" draw:text-style-name="P5" draw:layer="layout" svg:width="5.168cm" svg:height="1.003cm" svg:x="6.673cm" svg:y="9.523cm">
          <text:p text:style-name="P4"><text:span text:style-name="T16">0 rows repo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7" draw:style-name="gr8" draw:text-style-name="P9" draw:layer="layout" svg:width="11.229cm" svg:height="1.031cm" svg:x="11.884cm" svg:y="9.50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287" draw:text-style-name="P5" draw:layer="layout" svg:width="11.146cm" svg:height="1.003cm" svg:x="11.926cm" svg:y="9.523cm">
          <text:p text:style-name="P4"><text:span text:style-name="T16">no exact leakage repo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288" draw:text-style-name="P5" draw:layer="layout" svg:width="20.827cm" svg:height="0.888cm" svg:x="1.397cm" svg:y="11.024cm">
          <text:p text:style-name="P4"><text:span text:style-name="T24">Audit files: MCOD_inspection_report/*.csv and data_audit/MCOD/*.c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89" draw:text-style-name="P5" draw:layer="layout" svg:width="19.303cm" svg:height="1.066cm" svg:x="0.711cm" svg:y="0.457cm">
          <text:p text:style-name="P4"><text:span text:style-name="T2">Processing Pipeline: Spectral Vi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90" draw:text-style-name="P7" draw:layer="layout" svg:width="3.428cm" svg:height="0.71cm" svg:x="20.955cm" svg:y="0.559cm">
          <text:p text:style-name="P6"><text:span text:style-name="T3">10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91" draw:text-style-name="P5" draw:layer="layout" svg:width="21.589cm" svg:height="0.634cm" svg:x="0.762cm" svg:y="1.473cm">
          <text:p text:style-name="P4"><text:span text:style-name="T3">process_dataset.py generates model-ready views from each 8-band cu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01" draw:text-style-name="P13" draw:layer="layout" svg:width="11.112cm" svg:height="4.444cm" svg:x="1.175cm" svg:y="2.337cm">
          <draw:image xlink:href="Pictures/10000001000003E8000001907451D78D.png" xlink:type="simple" xlink:show="embed" xlink:actuate="onLoad" draw:mime-type="image/png">
            <text:p/>
          </draw:image>
        </draw:frame>
        <draw:custom-shape draw:name="Box 12" draw:style-name="gr33" draw:text-style-name="P3" draw:layer="layout" svg:width="4.247cm" svg:height="1.029cm" svg:x="12.827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92" draw:text-style-name="P5" draw:layer="layout" svg:width="4.163cm" svg:height="1.001cm" svg:x="12.869cm" svg:y="2.351cm">
          <text:p text:style-name="P4"><text:span text:style-name="T12">Output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4" draw:style-name="gr33" draw:text-style-name="P3" draw:layer="layout" svg:width="6.165cm" svg:height="1.029cm" svg:x="17.075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93" draw:text-style-name="P5" draw:layer="layout" svg:width="6.082cm" svg:height="1.001cm" svg:x="17.116cm" svg:y="2.351cm">
          <text:p text:style-name="P4"><text:span text:style-name="T12">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6" draw:style-name="gr8" draw:text-style-name="P9" draw:layer="layout" svg:width="4.247cm" svg:height="1.029cm" svg:x="12.827cm" svg:y="3.3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94" draw:text-style-name="P5" draw:layer="layout" svg:width="4.163cm" svg:height="1.001cm" svg:x="12.869cm" svg:y="3.381cm">
          <text:p text:style-name="P4"><text:span text:style-name="T13">official_false_col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8" draw:style-name="gr8" draw:text-style-name="P9" draw:layer="layout" svg:width="6.165cm" svg:height="1.029cm" svg:x="17.075cm" svg:y="3.3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95" draw:text-style-name="P5" draw:layer="layout" svg:width="6.082cm" svg:height="1.001cm" svg:x="17.116cm" svg:y="3.381cm">
          <text:p text:style-name="P4"><text:span text:style-name="T13">R=S5, G=S3, B=S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0" draw:style-name="gr8" draw:text-style-name="P9" draw:layer="layout" svg:width="4.247cm" svg:height="1.029cm" svg:x="12.827cm" svg:y="4.39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96" draw:text-style-name="P5" draw:layer="layout" svg:width="4.163cm" svg:height="1.001cm" svg:x="12.869cm" svg:y="4.411cm">
          <text:p text:style-name="P4"><text:span text:style-name="T13">S6_rededge_gray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2" draw:style-name="gr8" draw:text-style-name="P9" draw:layer="layout" svg:width="6.165cm" svg:height="1.029cm" svg:x="17.075cm" svg:y="4.39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97" draw:text-style-name="P5" draw:layer="layout" svg:width="6.082cm" svg:height="1.001cm" svg:x="17.116cm" svg:y="4.411cm">
          <text:p text:style-name="P4"><text:span text:style-name="T13">S6 normalized as 3-channel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4" draw:style-name="gr8" draw:text-style-name="P9" draw:layer="layout" svg:width="4.247cm" svg:height="1.029cm" svg:x="12.827cm" svg:y="5.42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98" draw:text-style-name="P5" draw:layer="layout" svg:width="4.163cm" svg:height="1.001cm" svg:x="12.869cm" svg:y="5.441cm">
          <text:p text:style-name="P4"><text:span text:style-name="T13">S7_nir1_gray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6" draw:style-name="gr8" draw:text-style-name="P9" draw:layer="layout" svg:width="6.165cm" svg:height="1.029cm" svg:x="17.075cm" svg:y="5.42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99" draw:text-style-name="P5" draw:layer="layout" svg:width="6.082cm" svg:height="1.001cm" svg:x="17.116cm" svg:y="5.441cm">
          <text:p text:style-name="P4"><text:span text:style-name="T13">S7 normalized as 3-channel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8" draw:style-name="gr8" draw:text-style-name="P9" draw:layer="layout" svg:width="4.247cm" svg:height="1.029cm" svg:x="12.827cm" svg:y="6.45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300" draw:text-style-name="P5" draw:layer="layout" svg:width="4.163cm" svg:height="1.001cm" svg:x="12.869cm" svg:y="6.471cm">
          <text:p text:style-name="P4"><text:span text:style-name="T13">S8_nir2_gray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0" draw:style-name="gr8" draw:text-style-name="P9" draw:layer="layout" svg:width="6.165cm" svg:height="1.029cm" svg:x="17.075cm" svg:y="6.45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301" draw:text-style-name="P5" draw:layer="layout" svg:width="6.082cm" svg:height="1.001cm" svg:x="17.116cm" svg:y="6.471cm">
          <text:p text:style-name="P4"><text:span text:style-name="T13">S8 normalized as 3-channel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2" draw:style-name="gr8" draw:text-style-name="P9" draw:layer="layout" svg:width="4.247cm" svg:height="1.029cm" svg:x="12.827cm" svg:y="7.48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302" draw:text-style-name="P5" draw:layer="layout" svg:width="4.163cm" svg:height="1.001cm" svg:x="12.869cm" svg:y="7.501cm">
          <text:p text:style-name="P4"><text:span text:style-name="T13">visible_group_proj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4" draw:style-name="gr8" draw:text-style-name="P9" draw:layer="layout" svg:width="6.165cm" svg:height="1.029cm" svg:x="17.075cm" svg:y="7.48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303" draw:text-style-name="P5" draw:layer="layout" svg:width="6.082cm" svg:height="1.001cm" svg:x="17.116cm" svg:y="7.501cm">
          <text:p text:style-name="P4"><text:span text:style-name="T13">PCA over S1-S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6" draw:style-name="gr8" draw:text-style-name="P9" draw:layer="layout" svg:width="4.247cm" svg:height="1.029cm" svg:x="12.827cm" svg:y="8.51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304" draw:text-style-name="P5" draw:layer="layout" svg:width="4.163cm" svg:height="1.001cm" svg:x="12.869cm" svg:y="8.531cm">
          <text:p text:style-name="P4"><text:span text:style-name="T13">nir_group_proj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8" draw:style-name="gr8" draw:text-style-name="P9" draw:layer="layout" svg:width="6.165cm" svg:height="1.029cm" svg:x="17.075cm" svg:y="8.51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305" draw:text-style-name="P5" draw:layer="layout" svg:width="6.082cm" svg:height="1.001cm" svg:x="17.116cm" svg:y="8.531cm">
          <text:p text:style-name="P4"><text:span text:style-name="T13">PCA over S6-S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0" draw:style-name="gr8" draw:text-style-name="P9" draw:layer="layout" svg:width="4.247cm" svg:height="1.029cm" svg:x="12.827cm" svg:y="9.5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306" draw:text-style-name="P5" draw:layer="layout" svg:width="4.163cm" svg:height="1.001cm" svg:x="12.869cm" svg:y="9.561cm">
          <text:p text:style-name="P4"><text:span text:style-name="T13">all8_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2" draw:style-name="gr8" draw:text-style-name="P9" draw:layer="layout" svg:width="6.165cm" svg:height="1.029cm" svg:x="17.075cm" svg:y="9.5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307" draw:text-style-name="P5" draw:layer="layout" svg:width="6.082cm" svg:height="1.001cm" svg:x="17.116cm" svg:y="9.561cm">
          <text:p text:style-name="P4"><text:span text:style-name="T13">H x W x 8 normalized t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4" draw:style-name="gr8" draw:text-style-name="P9" draw:layer="layout" svg:width="4.247cm" svg:height="1.029cm" svg:x="12.827cm" svg:y="10.5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308" draw:text-style-name="P5" draw:layer="layout" svg:width="4.163cm" svg:height="1.001cm" svg:x="12.869cm" svg:y="10.592cm">
          <text:p text:style-name="P4"><text:span text:style-name="T13">ground_truth_m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6" draw:style-name="gr8" draw:text-style-name="P9" draw:layer="layout" svg:width="6.165cm" svg:height="1.029cm" svg:x="17.075cm" svg:y="10.5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309" draw:text-style-name="P5" draw:layer="layout" svg:width="6.082cm" svg:height="1.001cm" svg:x="17.116cm" svg:y="10.592cm">
          <text:p text:style-name="P4"><text:span text:style-name="T13">official mask copied unchang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310" draw:text-style-name="P5" draw:layer="layout" svg:width="10.286cm" svg:height="2.539cm" svg:x="1.397cm" svg:y="7.874cm">
          <text:p text:style-name="P4"><text:span text:style-name="T25">Processed counts per view: 1027 train + 500 test for all eight output groups, including all8_input tensors and mas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11" draw:text-style-name="P5" draw:layer="layout" svg:width="19.303cm" svg:height="1.066cm" svg:x="0.711cm" svg:y="0.457cm">
          <text:p text:style-name="P4"><text:span text:style-name="T2">Repo Results: Available Baseline Out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12" draw:text-style-name="P7" draw:layer="layout" svg:width="3.428cm" svg:height="0.71cm" svg:x="20.955cm" svg:y="0.559cm">
          <text:p text:style-name="P6"><text:span text:style-name="T3">11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13" draw:text-style-name="P5" draw:layer="layout" svg:width="21.589cm" svg:height="0.634cm" svg:x="0.762cm" svg:y="1.473cm">
          <text:p text:style-name="P4"><text:span text:style-name="T3">MSIResults contains complete predictions for the 500-image test spl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" draw:style-name="gr33" draw:text-style-name="P3" draw:layer="layout" svg:width="5.079cm" svg:height="0.772cm" svg:x="1.143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14" draw:text-style-name="P5" draw:layer="layout" svg:width="4.996cm" svg:height="0.744cm" svg:x="1.185cm" svg:y="2.351cm">
          <text:p text:style-name="P4"><text:span text:style-name="T12">Method fol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" draw:style-name="gr33" draw:text-style-name="P3" draw:layer="layout" svg:width="2.539cm" svg:height="0.772cm" svg:x="6.223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15" draw:text-style-name="P5" draw:layer="layout" svg:width="2.456cm" svg:height="0.744cm" svg:x="6.265cm" svg:y="2.351cm">
          <text:p text:style-name="P4"><text:span text:style-name="T12">Pred m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5" draw:style-name="gr8" draw:text-style-name="P9" draw:layer="layout" svg:width="5.079cm" svg:height="0.772cm" svg:x="1.143cm" svg:y="3.10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16" draw:text-style-name="P5" draw:layer="layout" svg:width="4.996cm" svg:height="0.744cm" svg:x="1.185cm" svg:y="3.123cm">
          <text:p text:style-name="P4"><text:span text:style-name="T13">P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7" draw:style-name="gr8" draw:text-style-name="P9" draw:layer="layout" svg:width="2.539cm" svg:height="0.772cm" svg:x="6.223cm" svg:y="3.10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17" draw:text-style-name="P5" draw:layer="layout" svg:width="2.456cm" svg:height="0.744cm" svg:x="6.265cm" svg:y="3.123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9" draw:style-name="gr8" draw:text-style-name="P9" draw:layer="layout" svg:width="5.079cm" svg:height="0.772cm" svg:x="1.143cm" svg:y="3.88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18" draw:text-style-name="P5" draw:layer="layout" svg:width="4.996cm" svg:height="0.744cm" svg:x="1.185cm" svg:y="3.896cm">
          <text:p text:style-name="P4"><text:span text:style-name="T13">PC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1" draw:style-name="gr8" draw:text-style-name="P9" draw:layer="layout" svg:width="2.539cm" svg:height="0.772cm" svg:x="6.223cm" svg:y="3.88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19" draw:text-style-name="P5" draw:layer="layout" svg:width="2.456cm" svg:height="0.744cm" svg:x="6.265cm" svg:y="3.896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3" draw:style-name="gr8" draw:text-style-name="P9" draw:layer="layout" svg:width="5.079cm" svg:height="0.772cm" svg:x="1.143cm" svg:y="4.65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20" draw:text-style-name="P5" draw:layer="layout" svg:width="4.996cm" svg:height="0.744cm" svg:x="1.185cm" svg:y="4.668cm">
          <text:p text:style-name="P4"><text:span text:style-name="T13">Ide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5" draw:style-name="gr8" draw:text-style-name="P9" draw:layer="layout" svg:width="2.539cm" svg:height="0.772cm" svg:x="6.223cm" svg:y="4.65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21" draw:text-style-name="P5" draw:layer="layout" svg:width="2.456cm" svg:height="0.744cm" svg:x="6.265cm" svg:y="4.668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7" draw:style-name="gr8" draw:text-style-name="P9" draw:layer="layout" svg:width="5.079cm" svg:height="0.772cm" svg:x="1.143cm" svg:y="5.42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22" draw:text-style-name="P5" draw:layer="layout" svg:width="4.996cm" svg:height="0.744cm" svg:x="1.185cm" svg:y="5.441cm">
          <text:p text:style-name="P4"><text:span text:style-name="T13">FI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9" draw:style-name="gr8" draw:text-style-name="P9" draw:layer="layout" svg:width="2.539cm" svg:height="0.772cm" svg:x="6.223cm" svg:y="5.42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323" draw:text-style-name="P5" draw:layer="layout" svg:width="2.456cm" svg:height="0.744cm" svg:x="6.265cm" svg:y="5.441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1" draw:style-name="gr8" draw:text-style-name="P9" draw:layer="layout" svg:width="5.079cm" svg:height="0.772cm" svg:x="1.143cm" svg:y="6.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324" draw:text-style-name="P5" draw:layer="layout" svg:width="4.996cm" svg:height="0.744cm" svg:x="1.185cm" svg:y="6.214cm">
          <text:p text:style-name="P4"><text:span text:style-name="T13">SINet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3" draw:style-name="gr8" draw:text-style-name="P9" draw:layer="layout" svg:width="2.539cm" svg:height="0.772cm" svg:x="6.223cm" svg:y="6.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325" draw:text-style-name="P5" draw:layer="layout" svg:width="2.456cm" svg:height="0.744cm" svg:x="6.265cm" svg:y="6.214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5" draw:style-name="gr8" draw:text-style-name="P9" draw:layer="layout" svg:width="5.079cm" svg:height="0.772cm" svg:x="1.143cm" svg:y="6.97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326" draw:text-style-name="P5" draw:layer="layout" svg:width="4.996cm" svg:height="0.744cm" svg:x="1.185cm" svg:y="6.986cm">
          <text:p text:style-name="P4"><text:span text:style-name="T13">CODC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7" draw:style-name="gr8" draw:text-style-name="P9" draw:layer="layout" svg:width="2.539cm" svg:height="0.772cm" svg:x="6.223cm" svg:y="6.97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327" draw:text-style-name="P5" draw:layer="layout" svg:width="2.456cm" svg:height="0.744cm" svg:x="6.265cm" svg:y="6.986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9" draw:style-name="gr8" draw:text-style-name="P9" draw:layer="layout" svg:width="5.079cm" svg:height="0.772cm" svg:x="1.143cm" svg:y="7.74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328" draw:text-style-name="P5" draw:layer="layout" svg:width="4.996cm" svg:height="0.744cm" svg:x="1.185cm" svg:y="7.759cm">
          <text:p text:style-name="P4"><text:span text:style-name="T13">LS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1" draw:style-name="gr8" draw:text-style-name="P9" draw:layer="layout" svg:width="2.539cm" svg:height="0.772cm" svg:x="6.223cm" svg:y="7.74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329" draw:text-style-name="P5" draw:layer="layout" svg:width="2.456cm" svg:height="0.744cm" svg:x="6.265cm" svg:y="7.759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3" draw:style-name="gr8" draw:text-style-name="P9" draw:layer="layout" svg:width="5.079cm" svg:height="0.772cm" svg:x="1.143cm" svg:y="8.51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330" draw:text-style-name="P5" draw:layer="layout" svg:width="4.996cm" svg:height="0.744cm" svg:x="1.185cm" svg:y="8.531cm">
          <text:p text:style-name="P4"><text:span text:style-name="T13">SI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5" draw:style-name="gr8" draw:text-style-name="P9" draw:layer="layout" svg:width="2.539cm" svg:height="0.772cm" svg:x="6.223cm" svg:y="8.51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331" draw:text-style-name="P5" draw:layer="layout" svg:width="2.456cm" svg:height="0.744cm" svg:x="6.265cm" svg:y="8.531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7" draw:style-name="gr8" draw:text-style-name="P9" draw:layer="layout" svg:width="5.079cm" svg:height="0.772cm" svg:x="1.143cm" svg:y="9.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332" draw:text-style-name="P5" draw:layer="layout" svg:width="4.996cm" svg:height="0.744cm" svg:x="1.185cm" svg:y="9.304cm">
          <text:p text:style-name="P4"><text:span text:style-name="T13">C2FNet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9" draw:style-name="gr8" draw:text-style-name="P9" draw:layer="layout" svg:width="2.539cm" svg:height="0.772cm" svg:x="6.223cm" svg:y="9.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333" draw:text-style-name="P5" draw:layer="layout" svg:width="2.456cm" svg:height="0.744cm" svg:x="6.265cm" svg:y="9.304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1" draw:style-name="gr8" draw:text-style-name="P9" draw:layer="layout" svg:width="5.079cm" svg:height="0.772cm" svg:x="1.143cm" svg:y="10.06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334" draw:text-style-name="P5" draw:layer="layout" svg:width="4.996cm" svg:height="0.744cm" svg:x="1.185cm" svg:y="10.077cm">
          <text:p text:style-name="P4"><text:span text:style-name="T13">C2F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3" draw:style-name="gr8" draw:text-style-name="P9" draw:layer="layout" svg:width="2.539cm" svg:height="0.772cm" svg:x="6.223cm" svg:y="10.06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335" draw:text-style-name="P5" draw:layer="layout" svg:width="2.456cm" svg:height="0.744cm" svg:x="6.265cm" svg:y="10.077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5" draw:style-name="gr8" draw:text-style-name="P9" draw:layer="layout" svg:width="5.079cm" svg:height="0.772cm" svg:x="1.143cm" svg:y="10.8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336" draw:text-style-name="P5" draw:layer="layout" svg:width="4.996cm" svg:height="0.744cm" svg:x="1.185cm" svg:y="10.849cm">
          <text:p text:style-name="P4"><text:span text:style-name="T13">ASB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7" draw:style-name="gr8" draw:text-style-name="P9" draw:layer="layout" svg:width="2.539cm" svg:height="0.772cm" svg:x="6.223cm" svg:y="10.8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337" draw:text-style-name="P5" draw:layer="layout" svg:width="2.456cm" svg:height="0.744cm" svg:x="6.265cm" svg:y="10.849cm">
          <text:p text:style-name="P4"><text:span text:style-name="T13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0" draw:style-name="gr101" draw:text-style-name="P13" draw:layer="layout" svg:width="12.826cm" svg:height="6.413cm" svg:x="9.652cm" svg:y="2.572cm">
          <draw:image xlink:href="Pictures/10000000000005140000028A26BEADA0.png" xlink:type="simple" xlink:show="embed" xlink:actuate="onLoad" draw:mime-type="image/png">
            <text:p/>
          </draw:image>
        </draw:frame>
        <draw:custom-shape draw:name="Text 61" draw:style-name="gr338" draw:text-style-name="P5" draw:layer="layout" svg:width="12.064cm" svg:height="1.574cm" svg:x="10.033cm" svg:y="9.601cm">
          <text:p text:style-name="P4"><text:span text:style-name="T9">Local check agrees with the paper's broad picture: PRNet has the lowest MAE, PCNet has high overlap/structure behavior, and older baselines degrade strong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39" draw:text-style-name="P5" draw:layer="layout" svg:width="19.303cm" svg:height="1.066cm" svg:x="0.711cm" svg:y="0.457cm">
          <text:p text:style-name="P4"><text:span text:style-name="T2">Qualitative Snapsh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40" draw:text-style-name="P7" draw:layer="layout" svg:width="3.428cm" svg:height="0.71cm" svg:x="20.955cm" svg:y="0.559cm">
          <text:p text:style-name="P6"><text:span text:style-name="T3">12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1" draw:text-style-name="P5" draw:layer="layout" svg:width="21.589cm" svg:height="0.634cm" svg:x="0.762cm" svg:y="1.473cm">
          <text:p text:style-name="P4"><text:span text:style-name="T3">One test image across input, mask, and representative prediction 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01" draw:text-style-name="P13" draw:layer="layout" svg:width="22.097cm" svg:height="3.717cm" svg:x="1.143cm" svg:y="3.475cm">
          <draw:image xlink:href="Pictures/10000000000004EC000000D474307878.png" xlink:type="simple" xlink:show="embed" xlink:actuate="onLoad" draw:mime-type="image/png">
            <text:p/>
          </draw:image>
        </draw:frame>
        <draw:custom-shape draw:name="Text 12" draw:style-name="gr342" draw:text-style-name="P5" draw:layer="layout" svg:width="20.827cm" svg:height="1.98cm" svg:x="1.397cm" svg:y="9.093cm">
          <text:list text:style-name="L5">
            <text:list-item>
              <text:p text:style-name="P4"><text:span text:style-name="T14">Dense masks often differ in boundary sharpness and small-object recall even when aggregate MAE is low.</text:span></text:p>
            </text:list-item>
            <text:list-item>
              <text:p text:style-name="P4"><text:span text:style-name="T14">This motivates attribute-wise and failure-mode analysis rather than relying only on mean test-set scor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43" draw:text-style-name="P5" draw:layer="layout" svg:width="19.303cm" svg:height="1.066cm" svg:x="0.711cm" svg:y="0.457cm">
          <text:p text:style-name="P4"><text:span text:style-name="T2">Dataset Statistics From Aud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44" draw:text-style-name="P7" draw:layer="layout" svg:width="3.428cm" svg:height="0.71cm" svg:x="20.955cm" svg:y="0.559cm">
          <text:p text:style-name="P6"><text:span text:style-name="T3">13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5" draw:text-style-name="P5" draw:layer="layout" svg:width="21.589cm" svg:height="0.634cm" svg:x="0.762cm" svg:y="1.473cm">
          <text:p text:style-name="P4"><text:span text:style-name="T3">Object scale and spectral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01" draw:text-style-name="P13" draw:layer="layout" svg:width="9.556cm" svg:height="5.46cm" svg:x="1.445cm" svg:y="2.337cm">
          <draw:image xlink:href="Pictures/100000010000041A00000258D894D642.png" xlink:type="simple" xlink:show="embed" xlink:actuate="onLoad" draw:mime-type="image/png">
            <text:p/>
          </draw:image>
        </draw:frame>
        <draw:frame draw:name="Picture 12" draw:style-name="gr101" draw:text-style-name="P13" draw:layer="layout" svg:width="9.556cm" svg:height="5.46cm" svg:x="12.875cm" svg:y="2.337cm">
          <draw:image xlink:href="Pictures/100000010000041A00000258BF032386.png" xlink:type="simple" xlink:show="embed" xlink:actuate="onLoad" draw:mime-type="image/png">
            <text:p/>
          </draw:image>
        </draw:frame>
        <draw:frame draw:name="Picture 13" draw:style-name="gr101" draw:text-style-name="P13" draw:layer="layout" svg:width="6.444cm" svg:height="3.682cm" svg:x="3cm" svg:y="8.23cm">
          <draw:image xlink:href="Pictures/100000010000041A00000258F7A0399D.png" xlink:type="simple" xlink:show="embed" xlink:actuate="onLoad" draw:mime-type="image/png">
            <text:p/>
          </draw:image>
        </draw:frame>
        <draw:custom-shape draw:name="Text 14" draw:style-name="gr346" draw:text-style-name="P5" draw:layer="layout" svg:width="10.032cm" svg:height="2.666cm" svg:x="12.573cm" svg:y="8.331cm">
          <text:list text:style-name="L5">
            <text:list-item>
              <text:p text:style-name="P4"><text:span text:style-name="T9">Train/test area distributions are nearly matched: mean area ratio 0.00538 in both splits.</text:span></text:p>
            </text:list-item>
            <text:list-item>
              <text:p text:style-name="P4"><text:span text:style-name="T9">Band means and variances show that visible, red-edge, and NIR channels have distinct intensity statistic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47" draw:text-style-name="P5" draw:layer="layout" svg:width="19.303cm" svg:height="1.066cm" svg:x="0.711cm" svg:y="0.457cm">
          <text:p text:style-name="P4"><text:span text:style-name="T2">Evaluation Protoc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48" draw:text-style-name="P7" draw:layer="layout" svg:width="3.428cm" svg:height="0.71cm" svg:x="20.955cm" svg:y="0.559cm">
          <text:p text:style-name="P6"><text:span text:style-name="T3">14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9" draw:text-style-name="P5" draw:layer="layout" svg:width="21.589cm" svg:height="0.634cm" svg:x="0.762cm" svg:y="1.473cm">
          <text:p text:style-name="P4"><text:span text:style-name="T3">Metrics retained for research-grade repor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" draw:style-name="gr33" draw:text-style-name="P3" draw:layer="layout" svg:width="3.527cm" svg:height="1.11cm" svg:x="1.143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50" draw:text-style-name="P5" draw:layer="layout" svg:width="3.443cm" svg:height="1.082cm" svg:x="1.185cm" svg:y="2.351cm">
          <text:p text:style-name="P4"><text:span text:style-name="T15">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" draw:style-name="gr33" draw:text-style-name="P3" draw:layer="layout" svg:width="2.257cm" svg:height="1.11cm" svg:x="4.671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51" draw:text-style-name="P5" draw:layer="layout" svg:width="2.173cm" svg:height="1.082cm" svg:x="4.712cm" svg:y="2.351cm">
          <text:p text:style-name="P4"><text:span text:style-name="T15">Dir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5" draw:style-name="gr33" draw:text-style-name="P3" draw:layer="layout" svg:width="6.913cm" svg:height="1.11cm" svg:x="6.929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52" draw:text-style-name="P5" draw:layer="layout" svg:width="6.83cm" svg:height="1.082cm" svg:x="6.97cm" svg:y="2.351cm">
          <text:p text:style-name="P4"><text:span text:style-name="T15">Why it mat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7" draw:style-name="gr8" draw:text-style-name="P9" draw:layer="layout" svg:width="3.527cm" svg:height="1.11cm" svg:x="1.143cm" svg:y="3.4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53" draw:text-style-name="P5" draw:layer="layout" svg:width="3.443cm" svg:height="1.082cm" svg:x="1.185cm" svg:y="3.462cm">
          <text:p text:style-name="P4"><text:span text:style-name="T16">S-mea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9" draw:style-name="gr8" draw:text-style-name="P9" draw:layer="layout" svg:width="2.257cm" svg:height="1.11cm" svg:x="4.671cm" svg:y="3.4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54" draw:text-style-name="P5" draw:layer="layout" svg:width="2.173cm" svg:height="1.082cm" svg:x="4.712cm" svg:y="3.462cm">
          <text:p text:style-name="P4"><text:span text:style-name="T16">hig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1" draw:style-name="gr8" draw:text-style-name="P9" draw:layer="layout" svg:width="6.913cm" svg:height="1.11cm" svg:x="6.929cm" svg:y="3.4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55" draw:text-style-name="P5" draw:layer="layout" svg:width="6.83cm" svg:height="1.082cm" svg:x="6.97cm" svg:y="3.462cm">
          <text:p text:style-name="P4"><text:span text:style-name="T16">structural similarity of object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3" draw:style-name="gr8" draw:text-style-name="P9" draw:layer="layout" svg:width="3.527cm" svg:height="1.11cm" svg:x="1.143cm" svg:y="4.55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56" draw:text-style-name="P5" draw:layer="layout" svg:width="3.443cm" svg:height="1.082cm" svg:x="1.185cm" svg:y="4.573cm">
          <text:p text:style-name="P4"><text:span text:style-name="T16">E-mea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5" draw:style-name="gr8" draw:text-style-name="P9" draw:layer="layout" svg:width="2.257cm" svg:height="1.11cm" svg:x="4.671cm" svg:y="4.55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57" draw:text-style-name="P5" draw:layer="layout" svg:width="2.173cm" svg:height="1.082cm" svg:x="4.712cm" svg:y="4.573cm">
          <text:p text:style-name="P4"><text:span text:style-name="T16">hig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7" draw:style-name="gr8" draw:text-style-name="P9" draw:layer="layout" svg:width="6.913cm" svg:height="1.11cm" svg:x="6.929cm" svg:y="4.55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58" draw:text-style-name="P5" draw:layer="layout" svg:width="6.83cm" svg:height="1.082cm" svg:x="6.97cm" svg:y="4.573cm">
          <text:p text:style-name="P4"><text:span text:style-name="T16">alignment between prediction and G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9" draw:style-name="gr8" draw:text-style-name="P9" draw:layer="layout" svg:width="3.527cm" svg:height="1.11cm" svg:x="1.143cm" svg:y="5.67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359" draw:text-style-name="P5" draw:layer="layout" svg:width="3.443cm" svg:height="1.082cm" svg:x="1.185cm" svg:y="5.684cm">
          <text:p text:style-name="P4"><text:span text:style-name="T16">F-mea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1" draw:style-name="gr8" draw:text-style-name="P9" draw:layer="layout" svg:width="2.257cm" svg:height="1.11cm" svg:x="4.671cm" svg:y="5.67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360" draw:text-style-name="P5" draw:layer="layout" svg:width="2.173cm" svg:height="1.082cm" svg:x="4.712cm" svg:y="5.684cm">
          <text:p text:style-name="P4"><text:span text:style-name="T16">hig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3" draw:style-name="gr8" draw:text-style-name="P9" draw:layer="layout" svg:width="6.913cm" svg:height="1.11cm" svg:x="6.929cm" svg:y="5.67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361" draw:text-style-name="P5" draw:layer="layout" svg:width="6.83cm" svg:height="1.082cm" svg:x="6.97cm" svg:y="5.684cm">
          <text:p text:style-name="P4"><text:span text:style-name="T16">precision-recall bal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5" draw:style-name="gr8" draw:text-style-name="P9" draw:layer="layout" svg:width="3.527cm" svg:height="1.11cm" svg:x="1.143cm" svg:y="6.78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362" draw:text-style-name="P5" draw:layer="layout" svg:width="3.443cm" svg:height="1.082cm" svg:x="1.185cm" svg:y="6.796cm">
          <text:p text:style-name="P4"><text:span text:style-name="T16">MA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7" draw:style-name="gr8" draw:text-style-name="P9" draw:layer="layout" svg:width="2.257cm" svg:height="1.11cm" svg:x="4.671cm" svg:y="6.78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363" draw:text-style-name="P5" draw:layer="layout" svg:width="2.173cm" svg:height="1.082cm" svg:x="4.712cm" svg:y="6.796cm">
          <text:p text:style-name="P4"><text:span text:style-name="T16">lo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9" draw:style-name="gr8" draw:text-style-name="P9" draw:layer="layout" svg:width="6.913cm" svg:height="1.11cm" svg:x="6.929cm" svg:y="6.78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364" draw:text-style-name="P5" draw:layer="layout" svg:width="6.83cm" svg:height="1.082cm" svg:x="6.97cm" svg:y="6.796cm">
          <text:p text:style-name="P4"><text:span text:style-name="T16">pixel-level absolute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1" draw:style-name="gr8" draw:text-style-name="P9" draw:layer="layout" svg:width="3.527cm" svg:height="1.11cm" svg:x="1.143cm" svg:y="7.89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365" draw:text-style-name="P5" draw:layer="layout" svg:width="3.443cm" svg:height="1.082cm" svg:x="1.185cm" svg:y="7.907cm">
          <text:p text:style-name="P4"><text:span text:style-name="T16">Weighted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3" draw:style-name="gr8" draw:text-style-name="P9" draw:layer="layout" svg:width="2.257cm" svg:height="1.11cm" svg:x="4.671cm" svg:y="7.89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366" draw:text-style-name="P5" draw:layer="layout" svg:width="2.173cm" svg:height="1.082cm" svg:x="4.712cm" svg:y="7.907cm">
          <text:p text:style-name="P4"><text:span text:style-name="T16">hig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5" draw:style-name="gr8" draw:text-style-name="P9" draw:layer="layout" svg:width="6.913cm" svg:height="1.11cm" svg:x="6.929cm" svg:y="7.89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367" draw:text-style-name="P5" draw:layer="layout" svg:width="6.83cm" svg:height="1.082cm" svg:x="6.97cm" svg:y="7.907cm">
          <text:p text:style-name="P4"><text:span text:style-name="T16">spatially weighted F-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7" draw:style-name="gr8" draw:text-style-name="P9" draw:layer="layout" svg:width="3.527cm" svg:height="1.11cm" svg:x="1.143cm" svg:y="9.00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368" draw:text-style-name="P5" draw:layer="layout" svg:width="3.443cm" svg:height="1.082cm" svg:x="1.185cm" svg:y="9.018cm">
          <text:p text:style-name="P4"><text:span text:style-name="T16">Dice / mI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9" draw:style-name="gr8" draw:text-style-name="P9" draw:layer="layout" svg:width="2.257cm" svg:height="1.11cm" svg:x="4.671cm" svg:y="9.00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369" draw:text-style-name="P5" draw:layer="layout" svg:width="2.173cm" svg:height="1.082cm" svg:x="4.712cm" svg:y="9.018cm">
          <text:p text:style-name="P4"><text:span text:style-name="T16">hig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1" draw:style-name="gr8" draw:text-style-name="P9" draw:layer="layout" svg:width="6.913cm" svg:height="1.11cm" svg:x="6.929cm" svg:y="9.00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370" draw:text-style-name="P5" draw:layer="layout" svg:width="6.83cm" svg:height="1.082cm" svg:x="6.97cm" svg:y="9.018cm">
          <text:p text:style-name="P4"><text:span text:style-name="T16">thresholded overl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3" draw:style-name="gr8" draw:text-style-name="P9" draw:layer="layout" svg:width="3.527cm" svg:height="1.11cm" svg:x="1.143cm" svg:y="10.11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371" draw:text-style-name="P5" draw:layer="layout" svg:width="3.443cm" svg:height="1.082cm" svg:x="1.185cm" svg:y="10.129cm">
          <text:p text:style-name="P4"><text:span text:style-name="T16">Boundary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5" draw:style-name="gr8" draw:text-style-name="P9" draw:layer="layout" svg:width="2.257cm" svg:height="1.11cm" svg:x="4.671cm" svg:y="10.11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372" draw:text-style-name="P5" draw:layer="layout" svg:width="2.173cm" svg:height="1.082cm" svg:x="4.712cm" svg:y="10.129cm">
          <text:p text:style-name="P4"><text:span text:style-name="T16">hig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7" draw:style-name="gr8" draw:text-style-name="P9" draw:layer="layout" svg:width="6.913cm" svg:height="1.11cm" svg:x="6.929cm" svg:y="10.11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373" draw:text-style-name="P5" draw:layer="layout" svg:width="6.83cm" svg:height="1.082cm" svg:x="6.97cm" svg:y="10.129cm">
          <text:p text:style-name="P4"><text:span text:style-name="T16">contour qu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0" draw:style-name="gr22" draw:text-style-name="P11" draw:layer="layout" svg:width="8cm" svg:height="7.492cm" svg:x="14.732cm" svg:y="2.5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61" draw:style-name="gr374" draw:text-style-name="P5" draw:layer="layout" svg:width="6.984cm" svg:height="1.142cm" svg:x="15.189cm" svg:y="2.921cm">
          <text:p text:style-name="P4"><text:span text:style-name="T8">Reporting r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375" draw:text-style-name="P5" draw:layer="layout" svg:width="6.857cm" svg:height="4.19cm" svg:x="15.189cm" svg:y="4.369cm">
          <text:list text:style-name="L5">
            <text:list-item>
              <text:p text:style-name="P4"><text:span text:style-name="T9">Report both aggregate and attribute-wise scores.</text:span></text:p>
            </text:list-item>
            <text:list-item>
              <text:p text:style-name="P4"><text:span text:style-name="T9">State whether masks are official, binarized, resized, or interpolated.</text:span></text:p>
            </text:list-item>
            <text:list-item>
              <text:p text:style-name="P4"><text:span text:style-name="T9">Separate official paper metrics from local verification metric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76" draw:text-style-name="P5" draw:layer="layout" svg:width="19.303cm" svg:height="1.066cm" svg:x="0.711cm" svg:y="0.457cm">
          <text:p text:style-name="P4"><text:span text:style-name="T2">Failure Modes To Analyze N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77" draw:text-style-name="P7" draw:layer="layout" svg:width="3.428cm" svg:height="0.71cm" svg:x="20.955cm" svg:y="0.559cm">
          <text:p text:style-name="P6"><text:span text:style-name="T3">15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78" draw:text-style-name="P5" draw:layer="layout" svg:width="21.589cm" svg:height="0.634cm" svg:x="0.762cm" svg:y="1.473cm">
          <text:p text:style-name="P4"><text:span text:style-name="T3">Where MCOD remains diffic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" draw:style-name="gr8" draw:text-style-name="P9" draw:layer="layout" svg:width="6.73cm" svg:height="8.762cm" svg:x="1.067cm" svg:y="2.41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2" draw:style-name="gr379" draw:text-style-name="P5" draw:layer="layout" svg:width="5.587cm" svg:height="0.888cm" svg:x="1.473cm" svg:y="2.845cm">
          <text:p text:style-name="P4"><text:span text:style-name="T11">Small ob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80" draw:text-style-name="P5" draw:layer="layout" svg:width="5.485cm" svg:height="4.571cm" svg:x="1.473cm" svg:y="4.191cm">
          <text:p text:style-name="P4"><text:span text:style-name="T14">Low absolute pixel area can yield deceptively good MAE while missing the object. Need Dice, IoU, boundary, and attribute-specific reca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4" draw:style-name="gr22" draw:text-style-name="P11" draw:layer="layout" svg:width="6.73cm" svg:height="8.762cm" svg:x="8.814cm" svg:y="2.41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5" draw:style-name="gr381" draw:text-style-name="P5" draw:layer="layout" svg:width="5.587cm" svg:height="0.888cm" svg:x="9.22cm" svg:y="2.845cm">
          <text:p text:style-name="P4"><text:span text:style-name="T8">Lighting extre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82" draw:text-style-name="P5" draw:layer="layout" svg:width="5.485cm" svg:height="4.571cm" svg:x="9.22cm" svg:y="4.191cm">
          <text:p text:style-name="P4"><text:span text:style-name="T14">UI, OE, and II can collapse visible contrast. MSI should be tested under band drop, noise, and exposure perturb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7" draw:style-name="gr27" draw:text-style-name="P12" draw:layer="layout" svg:width="6.73cm" svg:height="8.762cm" svg:x="16.561cm" svg:y="2.41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8" draw:style-name="gr383" draw:text-style-name="P5" draw:layer="layout" svg:width="5.587cm" svg:height="0.888cm" svg:x="16.967cm" svg:y="2.845cm">
          <text:p text:style-name="P4"><text:span text:style-name="T10">Spectral al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84" draw:text-style-name="P5" draw:layer="layout" svg:width="5.485cm" svg:height="4.571cm" svg:x="16.967cm" svg:y="4.191cm">
          <text:p text:style-name="P4"><text:span text:style-name="T14">Real sensors can misregister bands. Robustness should include spatial shifts between visible, red-edge, and NIR grou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85" draw:text-style-name="P5" draw:layer="layout" svg:width="19.303cm" svg:height="1.066cm" svg:x="0.711cm" svg:y="0.457cm">
          <text:p text:style-name="P4"><text:span text:style-name="T2">Planned Experiment Matr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86" draw:text-style-name="P7" draw:layer="layout" svg:width="3.428cm" svg:height="0.71cm" svg:x="20.955cm" svg:y="0.559cm">
          <text:p text:style-name="P6"><text:span text:style-name="T3">16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87" draw:text-style-name="P5" draw:layer="layout" svg:width="21.589cm" svg:height="0.634cm" svg:x="0.762cm" svg:y="1.473cm">
          <text:p text:style-name="P4"><text:span text:style-name="T3">From current repository state to publishable benchmark exten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1" draw:style-name="gr33" draw:text-style-name="P3" draw:layer="layout" svg:width="2.248cm" svg:height="1.287cm" svg:x="1.067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88" draw:text-style-name="P5" draw:layer="layout" svg:width="2.165cm" svg:height="1.259cm" svg:x="1.108cm" svg:y="2.351cm">
          <text:p text:style-name="P4"><text:span text:style-name="T15">St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3" draw:style-name="gr33" draw:text-style-name="P3" draw:layer="layout" svg:width="8.476cm" svg:height="1.287cm" svg:x="3.316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89" draw:text-style-name="P5" draw:layer="layout" svg:width="8.393cm" svg:height="1.259cm" svg:x="3.357cm" svg:y="2.351cm">
          <text:p text:style-name="P4"><text:span text:style-name="T15">Experi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5" draw:style-name="gr33" draw:text-style-name="P3" draw:layer="layout" svg:width="11.244cm" svg:height="1.287cm" svg:x="11.793cm" svg:y="2.3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90" draw:text-style-name="P5" draw:layer="layout" svg:width="11.161cm" svg:height="1.259cm" svg:x="11.834cm" svg:y="2.351cm">
          <text:p text:style-name="P4"><text:span text:style-name="T15">Main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7" draw:style-name="gr8" draw:text-style-name="P9" draw:layer="layout" svg:width="2.248cm" svg:height="1.287cm" svg:x="1.067cm" svg:y="3.62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91" draw:text-style-name="P5" draw:layer="layout" svg:width="2.165cm" svg:height="1.259cm" svg:x="1.108cm" svg:y="3.639cm">
          <text:p text:style-name="P4"><text:span text:style-name="T1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9" draw:style-name="gr8" draw:text-style-name="P9" draw:layer="layout" svg:width="8.476cm" svg:height="1.287cm" svg:x="3.316cm" svg:y="3.62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92" draw:text-style-name="P5" draw:layer="layout" svg:width="8.393cm" svg:height="1.259cm" svg:x="3.357cm" svg:y="3.639cm">
          <text:p text:style-name="P4"><text:span text:style-name="T16">Manifest and audit fin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1" draw:style-name="gr8" draw:text-style-name="P9" draw:layer="layout" svg:width="11.244cm" svg:height="1.287cm" svg:x="11.793cm" svg:y="3.62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93" draw:text-style-name="P5" draw:layer="layout" svg:width="11.161cm" svg:height="1.259cm" svg:x="11.834cm" svg:y="3.639cm">
          <text:p text:style-name="P4"><text:span text:style-name="T16">frozen CSV manifest + QC re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3" draw:style-name="gr8" draw:text-style-name="P9" draw:layer="layout" svg:width="2.248cm" svg:height="1.287cm" svg:x="1.067cm" svg:y="4.9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94" draw:text-style-name="P5" draw:layer="layout" svg:width="2.165cm" svg:height="1.259cm" svg:x="1.108cm" svg:y="4.927cm">
          <text:p text:style-name="P4"><text:span text:style-name="T1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5" draw:style-name="gr8" draw:text-style-name="P9" draw:layer="layout" svg:width="8.476cm" svg:height="1.287cm" svg:x="3.316cm" svg:y="4.9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95" draw:text-style-name="P5" draw:layer="layout" svg:width="8.393cm" svg:height="1.259cm" svg:x="3.357cm" svg:y="4.927cm">
          <text:p text:style-name="P4"><text:span text:style-name="T16">Baseline re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7" draw:style-name="gr8" draw:text-style-name="P9" draw:layer="layout" svg:width="11.244cm" svg:height="1.287cm" svg:x="11.793cm" svg:y="4.9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96" draw:text-style-name="P5" draw:layer="layout" svg:width="11.161cm" svg:height="1.259cm" svg:x="11.834cm" svg:y="4.927cm">
          <text:p text:style-name="P4"><text:span text:style-name="T16">official metric table on 500 test 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29" draw:style-name="gr8" draw:text-style-name="P9" draw:layer="layout" svg:width="2.248cm" svg:height="1.287cm" svg:x="1.067cm" svg:y="6.2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397" draw:text-style-name="P5" draw:layer="layout" svg:width="2.165cm" svg:height="1.259cm" svg:x="1.108cm" svg:y="6.215cm">
          <text:p text:style-name="P4"><text:span text:style-name="T1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1" draw:style-name="gr8" draw:text-style-name="P9" draw:layer="layout" svg:width="8.476cm" svg:height="1.287cm" svg:x="3.316cm" svg:y="6.2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398" draw:text-style-name="P5" draw:layer="layout" svg:width="8.393cm" svg:height="1.259cm" svg:x="3.357cm" svg:y="6.215cm">
          <text:p text:style-name="P4"><text:span text:style-name="T16">Spectral view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3" draw:style-name="gr8" draw:text-style-name="P9" draw:layer="layout" svg:width="11.244cm" svg:height="1.287cm" svg:x="11.793cm" svg:y="6.2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399" draw:text-style-name="P5" draw:layer="layout" svg:width="11.161cm" svg:height="1.259cm" svg:x="11.834cm" svg:y="6.215cm">
          <text:p text:style-name="P4"><text:span text:style-name="T16">false color vs S6/S7/S8 vs PCA vi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5" draw:style-name="gr8" draw:text-style-name="P9" draw:layer="layout" svg:width="2.248cm" svg:height="1.287cm" svg:x="1.067cm" svg:y="7.48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400" draw:text-style-name="P5" draw:layer="layout" svg:width="2.165cm" svg:height="1.259cm" svg:x="1.108cm" svg:y="7.503cm">
          <text:p text:style-name="P4"><text:span text:style-name="T1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7" draw:style-name="gr8" draw:text-style-name="P9" draw:layer="layout" svg:width="8.476cm" svg:height="1.287cm" svg:x="3.316cm" svg:y="7.48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401" draw:text-style-name="P5" draw:layer="layout" svg:width="8.393cm" svg:height="1.259cm" svg:x="3.357cm" svg:y="7.503cm">
          <text:p text:style-name="P4"><text:span text:style-name="T16">Foundation-model prompt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9" draw:style-name="gr8" draw:text-style-name="P9" draw:layer="layout" svg:width="11.244cm" svg:height="1.287cm" svg:x="11.793cm" svg:y="7.48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402" draw:text-style-name="P5" draw:layer="layout" svg:width="11.161cm" svg:height="1.259cm" svg:x="11.834cm" svg:y="7.503cm">
          <text:p text:style-name="P4"><text:span text:style-name="T16">SAM/SAM2 prompt sensi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1" draw:style-name="gr8" draw:text-style-name="P9" draw:layer="layout" svg:width="2.248cm" svg:height="1.287cm" svg:x="1.067cm" svg:y="8.7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403" draw:text-style-name="P5" draw:layer="layout" svg:width="2.165cm" svg:height="1.259cm" svg:x="1.108cm" svg:y="8.791cm">
          <text:p text:style-name="P4"><text:span text:style-name="T1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3" draw:style-name="gr8" draw:text-style-name="P9" draw:layer="layout" svg:width="8.476cm" svg:height="1.287cm" svg:x="3.316cm" svg:y="8.7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404" draw:text-style-name="P5" draw:layer="layout" svg:width="8.393cm" svg:height="1.259cm" svg:x="3.357cm" svg:y="8.791cm">
          <text:p text:style-name="P4"><text:span text:style-name="T16">Spectral degradation robust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5" draw:style-name="gr8" draw:text-style-name="P9" draw:layer="layout" svg:width="11.244cm" svg:height="1.287cm" svg:x="11.793cm" svg:y="8.7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405" draw:text-style-name="P5" draw:layer="layout" svg:width="11.161cm" svg:height="1.259cm" svg:x="11.834cm" svg:y="8.791cm">
          <text:p text:style-name="P4"><text:span text:style-name="T16">band drop/noise/misalignment cur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7" draw:style-name="gr8" draw:text-style-name="P9" draw:layer="layout" svg:width="2.248cm" svg:height="1.287cm" svg:x="1.067cm" svg:y="10.06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406" draw:text-style-name="P5" draw:layer="layout" svg:width="2.165cm" svg:height="1.259cm" svg:x="1.108cm" svg:y="10.08cm">
          <text:p text:style-name="P4"><text:span text:style-name="T1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49" draw:style-name="gr8" draw:text-style-name="P9" draw:layer="layout" svg:width="8.476cm" svg:height="1.287cm" svg:x="3.316cm" svg:y="10.06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407" draw:text-style-name="P5" draw:layer="layout" svg:width="8.393cm" svg:height="1.259cm" svg:x="3.357cm" svg:y="10.08cm">
          <text:p text:style-name="P4"><text:span text:style-name="T16">Attribute-wise failur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51" draw:style-name="gr8" draw:text-style-name="P9" draw:layer="layout" svg:width="11.244cm" svg:height="1.287cm" svg:x="11.793cm" svg:y="10.06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408" draw:text-style-name="P5" draw:layer="layout" svg:width="11.161cm" svg:height="1.259cm" svg:x="11.834cm" svg:y="10.08cm">
          <text:p text:style-name="P4"><text:span text:style-name="T16">SO/EI/BS/CB breakdown and 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Box 2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3" draw:style-name="gr2" draw:text-style-name="P3" draw:layer="layout" svg:width="0.253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09" draw:text-style-name="P5" draw:layer="layout" svg:width="19.303cm" svg:height="1.066cm" svg:x="0.711cm" svg:y="0.457cm">
          <text:p text:style-name="P4"><text:span text:style-name="T2">Contributions And Takea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10" draw:text-style-name="P7" draw:layer="layout" svg:width="3.428cm" svg:height="0.71cm" svg:x="20.955cm" svg:y="0.559cm">
          <text:p text:style-name="P6"><text:span text:style-name="T3">17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6" draw:style-name="gr5" draw:text-style-name="P8" draw:layer="layout" svg:width="23.062cm" svg:height="0.029cm" svg:x="0.711cm" svg:y="1.6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11" draw:text-style-name="P5" draw:layer="layout" svg:width="21.589cm" svg:height="0.634cm" svg:x="0.762cm" svg:y="1.473cm">
          <text:p text:style-name="P4"><text:span text:style-name="T3">What this project can credibly claim 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12" draw:text-style-name="P5" draw:layer="layout" svg:width="20.827cm" svg:height="5.079cm" svg:x="1.397cm" svg:y="2.591cm">
          <text:p text:style-name="P4"><text:span text:style-name="T26">1. MCOD paper review establishes the research gap: RGB COD lacks spectral evidence.</text:span></text:p>
          <text:p text:style-name="P4"><text:span text:style-name="T26">2. Repo now contains a corrected MCOD_resized working dataset with verified split, counts, masks, and resolution.</text:span></text:p>
          <text:p text:style-name="P4"><text:span text:style-name="T26">3. process_dataset.py creates multiple MSI-to-RGB and tensor-native views for controlled experiments.</text:span></text:p>
          <text:p text:style-name="P4"><text:span text:style-name="T26">4. Existing MSIResults predictions cover all 500 test images for 11 baseline methods.</text:span></text:p>
          <text:p text:style-name="P4"><text:span text:style-name="T26">5. Next research value comes from attribute-wise and spectral-degradation robustness experim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x 12" draw:style-name="gr22" draw:text-style-name="P11" draw:layer="layout" svg:width="20.319cm" svg:height="1.726cm" svg:x="1.524cm" svg:y="9.27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3" draw:style-name="gr413" draw:text-style-name="P5" draw:layer="layout" svg:width="19.176cm" svg:height="0.964cm" svg:x="1.981cm" svg:y="9.55cm">
          <text:p text:style-name="P4"><text:span text:style-name="T19">One-sentence thesis: MCOD makes camouflage detection a spectral robustness problem, not only an RGB segmentation probl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1:12:42</meta:creation-date>
    <meta:initial-creator>PptxGenJS</meta:initial-creator>
    <dc:language>en-US</dc:language>
    <dc:date>2026-06-08T09:50:57.340561502</dc:date>
    <meta:editing-cycles>3</meta:editing-cycles>
    <dc:subject>PptxGenJS Presentation</dc:subject>
    <dc:title>Camouflage Military Object Detection: DFAN &amp; SINet-V2</dc:title>
    <meta:generator>LibreOffice/24.2.7.2$Linux_X86_64 LibreOffice_project/420$Build-2</meta:generator>
    <meta:editing-duration>P2DT16H18M8S</meta:editing-duration>
    <meta:document-statistic meta:object-count="850"/>
    <meta:user-defined meta:name="AppVersion">16.0000</meta:user-defined>
    <meta:user-defined meta:name="Notes" meta:value-type="float">12</meta:user-defined>
    <meta:user-defined meta:name="PresentationFormat">On-screen Show (16:9)</meta:user-defined>
    <meta:user-defined meta:name="Slides" meta:value-type="float">17</meta:user-defined>
  </office:meta>
</office:document-meta>
</file>